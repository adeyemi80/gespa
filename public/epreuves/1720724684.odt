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Pictures/10000201000001FD0000017AAAB93972C58433AA.png" manifest:media-type="image/png"/>
  <manifest:file-entry manifest:full-path="Pictures/10000201000002AE0000009DE39C39A3D988C5A2.png" manifest:media-type="image/png"/>
  <manifest:file-entry manifest:full-path="Pictures/10000000000001BA0000023152F9B31759BEB589.jpg" manifest:media-type="image/jpe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 PL Mingti2L Big5" svg:font-family="'AR PL Mingti2L Big5'"/>
    <style:font-face style:name="Courier New" svg:font-family="'Courier New'"/>
    <style:font-face style:name="Lohit Devanagari1" svg:font-family="'Lohit Devanagari'"/>
    <style:font-face style:name="Liberation Serif1" svg:font-family="'Liberation Serif'" style:font-family-generic="roman"/>
    <style:font-face style:name="Arial narrow" svg:font-family="'Arial narrow'" style:font-family-generic="swiss"/>
    <style:font-face style:name="Abyssinica SIL" svg:font-family="'Abyssinica SIL'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Z003" svg:font-family="Z003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au1" style:family="table">
      <style:table-properties style:width="11.913cm" table:align="left" style:may-break-between-rows="true" table:border-model="collapsing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C" style:family="table-column">
      <style:table-column-properties style:column-width="2.145cm"/>
    </style:style>
    <style:style style:name="Tableau1.D" style:family="table-column">
      <style:table-column-properties style:column-width="2.388cm"/>
    </style:style>
    <style:style style:name="Tableau1.E" style:family="table-column">
      <style:table-column-properties style:column-width="2.52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9cm" style:rel-column-width="9362*"/>
    </style:style>
    <style:style style:name="Tableau2.G" style:family="table-column">
      <style:table-column-properties style:column-width="2.429cm" style:rel-column-width="9363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margin-top="0cm" fo:margin-bottom="0.282cm" loext:contextual-spacing="false" fo:text-align="center" style:justify-single-word="false"/>
      <style:text-properties officeooo:paragraph-rsid="0025c235"/>
    </style:style>
    <style:style style:name="P2" style:family="paragraph" style:parent-style-name="Header">
      <style:paragraph-properties fo:text-align="start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823b0b" style:writing-mode="lr-tb"/>
      <style:text-properties officeooo:paragraph-rsid="00041a1e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41a1e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224fa7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d5e23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32e4b9"/>
    </style:style>
    <style:style style:name="P7" style:family="paragraph" style:parent-style-name="Standard">
      <style:paragraph-properties fo:text-align="start" style:justify-single-word="false" style:writing-mode="lr-tb"/>
      <style:text-properties style:text-position="0% 100%" style:font-name="Arial narrow" officeooo:rsid="00103426" officeooo:paragraph-rsid="00103426"/>
    </style:style>
    <style:style style:name="P8" style:family="paragraph" style:parent-style-name="Standard">
      <style:paragraph-properties fo:text-align="start" style:justify-single-word="false" style:writing-mode="lr-tb"/>
      <style:text-properties style:text-position="0% 100%" style:font-name="Arial narrow" officeooo:rsid="00103426" officeooo:paragraph-rsid="002d5e23"/>
    </style:style>
    <style:style style:name="P9" style:family="paragraph" style:parent-style-name="Standard">
      <style:paragraph-properties fo:text-align="start" style:justify-single-word="false" style:writing-mode="lr-tb"/>
      <style:text-properties style:text-position="0% 100%" style:font-name="Arial narrow" officeooo:rsid="00103426" officeooo:paragraph-rsid="0032e4b9"/>
    </style:style>
    <style:style style:name="P10" style:family="paragraph" style:parent-style-name="Standard">
      <style:paragraph-properties fo:text-align="start" style:justify-single-word="false" style:writing-mode="lr-tb"/>
      <style:text-properties style:text-position="0% 100%" style:font-name="Arial narrow" officeooo:rsid="00103426" officeooo:paragraph-rsid="002eed34"/>
    </style:style>
    <style:style style:name="P11" style:family="paragraph" style:parent-style-name="Standard">
      <style:paragraph-properties fo:text-align="start" style:justify-single-word="false" style:writing-mode="lr-tb"/>
      <style:text-properties style:text-position="0% 100%" style:font-name="Arial narrow" officeooo:rsid="000c3259" officeooo:paragraph-rsid="002d17ca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Arial narrow" officeooo:paragraph-rsid="0014e2fe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Arial narrow" officeooo:paragraph-rsid="00179692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Arial narrow" officeooo:paragraph-rsid="00103426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Arial narrow" officeooo:paragraph-rsid="00111a92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Arial narrow" officeooo:paragraph-rsid="002d5e23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Arial narrow" fo:font-size="12pt" fo:font-weight="bold" officeooo:paragraph-rsid="0010342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Arial narrow" fo:font-size="12pt" fo:font-weight="bold" officeooo:paragraph-rsid="00111a9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Arial narrow" fo:font-size="12pt" fo:font-weight="normal" officeooo:rsid="00103426" officeooo:paragraph-rsid="0010342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Arial narrow" fo:font-size="12pt" fo:font-weight="normal" officeooo:rsid="00103426" officeooo:paragraph-rsid="00111a9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Arial narrow" fo:font-size="12pt" officeooo:rsid="00103426" officeooo:paragraph-rsid="00103426" style:font-size-asian="12pt" style:font-size-complex="12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Arial narrow" fo:font-size="12pt" officeooo:rsid="00103426" officeooo:paragraph-rsid="00111a92" style:font-size-asian="12pt" style:font-size-complex="12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Arial narrow" fo:font-size="12pt" officeooo:rsid="002b9ff9" officeooo:paragraph-rsid="002b9ff9" style:font-size-asian="12pt" style:font-size-complex="12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Arial narrow" officeooo:rsid="002a5846" officeooo:paragraph-rsid="002a5846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font-name="Arial narrow" fo:font-size="12pt" style:text-underline-style="none" fo:font-weight="bold" officeooo:rsid="0005acce" officeooo:paragraph-rsid="0005acce" style:font-size-asian="12pt" style:font-weight-asian="bold" style:font-size-complex="12pt"/>
    </style:style>
    <style:style style:name="P26" style:family="paragraph" style:parent-style-name="Standard">
      <style:paragraph-properties fo:margin-top="0cm" fo:margin-bottom="0cm" loext:contextual-spacing="false" fo:line-height="115%" fo:text-align="center" style:justify-single-word="false" style:writing-mode="lr-tb"/>
      <style:text-properties officeooo:paragraph-rsid="00041a1e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823b0b" style:writing-mode="lr-tb"/>
      <style:text-properties style:font-name="Abyssinica SIL" fo:font-size="14pt" fo:font-weight="bold" officeooo:paragraph-rsid="00041a1e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hyphenation-ladder-count="no-limit" fo:text-indent="0cm" style:auto-text-indent="false" style:vertical-align="auto" style:writing-mode="lr-tb">
        <style:tab-stops>
          <style:tab-stop style:position="9.077cm"/>
        </style:tab-stops>
      </style:paragraph-properties>
      <style:text-properties officeooo:paragraph-rsid="00041a1e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margin-top="0cm" fo:margin-bottom="0.282cm" loext:contextual-spacing="false" fo:line-height="105%" fo:text-align="center" style:justify-single-word="false" fo:orphans="2" fo:widows="2" fo:hyphenation-ladder-count="no-limit" fo:text-indent="0cm" style:auto-text-indent="false" style:writing-mode="lr-tb"/>
      <style:text-properties style:font-name="Arial narrow" officeooo:rsid="002dbebb" officeooo:paragraph-rsid="002dbebb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cm" fo:margin-right="0cm" fo:margin-top="0cm" fo:margin-bottom="0.282cm" loext:contextual-spacing="false" fo:line-height="105%" fo:text-align="center" style:justify-single-word="false" fo:orphans="2" fo:widows="2" fo:hyphenation-ladder-count="no-limit" fo:text-indent="0cm" style:auto-text-indent="false" style:writing-mode="lr-tb"/>
      <style:text-properties style:font-name="Z003" fo:font-size="12pt" fo:font-weight="bold" officeooo:paragraph-rsid="002dbebb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1" style:family="paragraph" style:parent-style-name="Standard">
      <style:text-properties style:text-position="0% 100%" style:font-name="Arial narrow" officeooo:rsid="000c3259" officeooo:paragraph-rsid="0015f58a"/>
    </style:style>
    <style:style style:name="P32" style:family="paragraph" style:parent-style-name="Standard">
      <style:text-properties style:text-position="0% 100%" style:font-name="Arial narrow" officeooo:rsid="000c3259" officeooo:paragraph-rsid="00067bfe"/>
    </style:style>
    <style:style style:name="P33" style:family="paragraph" style:parent-style-name="Standard">
      <style:text-properties style:text-position="0% 100%" style:font-name="Arial narrow" officeooo:rsid="000c3259" officeooo:paragraph-rsid="000b037d"/>
    </style:style>
    <style:style style:name="P34" style:family="paragraph" style:parent-style-name="Standard">
      <style:text-properties style:text-position="0% 100%" style:font-name="Arial narrow" officeooo:rsid="000c3259" officeooo:paragraph-rsid="00111a92"/>
    </style:style>
    <style:style style:name="P35" style:family="paragraph" style:parent-style-name="Standard">
      <style:text-properties style:text-position="0% 100%" style:font-name="Arial narrow" officeooo:rsid="000c3259" officeooo:paragraph-rsid="0023cd5a"/>
    </style:style>
    <style:style style:name="P36" style:family="paragraph" style:parent-style-name="Standard">
      <style:text-properties style:text-position="0% 100%" style:font-name="Arial narrow" officeooo:rsid="000c3259" officeooo:paragraph-rsid="000f08a6"/>
    </style:style>
    <style:style style:name="P37" style:family="paragraph" style:parent-style-name="Standard">
      <style:text-properties fo:color="#000000" style:font-name="Arial narrow" fo:font-size="12pt" style:text-underline-style="none" fo:font-weight="normal" officeooo:paragraph-rsid="000c7249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Arial narrow" fo:font-size="12pt" style:text-underline-style="none" fo:font-weight="normal" officeooo:paragraph-rsid="001e749b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Arial narrow" fo:font-size="12pt" style:text-underline-style="none" fo:font-weight="normal" officeooo:paragraph-rsid="002d5e2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 narrow" fo:font-size="12pt" style:text-underline-style="none" fo:font-weight="bold" officeooo:paragraph-rsid="00067bfe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Arial narrow" fo:font-size="12pt" style:text-underline-style="none" fo:font-weight="bold" officeooo:paragraph-rsid="000c7249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Arial narrow" officeooo:paragraph-rsid="000f08a6"/>
    </style:style>
    <style:style style:name="P43" style:family="paragraph" style:parent-style-name="Standard">
      <style:text-properties style:font-name="Arial narrow" officeooo:paragraph-rsid="00067bfe"/>
    </style:style>
    <style:style style:name="P44" style:family="paragraph" style:parent-style-name="Standard">
      <style:text-properties style:font-name="Arial narrow" fo:font-weight="bold" officeooo:paragraph-rsid="00067bfe" style:font-weight-asian="bold" style:font-weight-complex="bold"/>
    </style:style>
    <style:style style:name="P45" style:family="paragraph" style:parent-style-name="Standard">
      <style:text-properties style:font-name="Arial narrow" officeooo:paragraph-rsid="00103426"/>
    </style:style>
    <style:style style:name="P46" style:family="paragraph" style:parent-style-name="Standard">
      <style:text-properties style:font-name="Arial narrow" fo:font-weight="normal" officeooo:paragraph-rsid="00067bfe" style:font-weight-asian="normal" style:font-weight-complex="normal"/>
    </style:style>
    <style:style style:name="P47" style:family="paragraph" style:parent-style-name="Standard">
      <style:text-properties style:font-name="Arial narrow" officeooo:paragraph-rsid="000c7249"/>
    </style:style>
    <style:style style:name="P48" style:family="paragraph" style:parent-style-name="Standard">
      <style:text-properties style:font-name="Arial narrow" officeooo:paragraph-rsid="00266aec"/>
    </style:style>
    <style:style style:name="P49" style:family="paragraph" style:parent-style-name="Standard">
      <style:text-properties style:font-name="Arial narrow" officeooo:paragraph-rsid="002d5e23"/>
    </style:style>
    <style:style style:name="P50" style:family="paragraph" style:parent-style-name="Standard">
      <style:text-properties style:font-name="Arial narrow" officeooo:paragraph-rsid="00321551"/>
    </style:style>
    <style:style style:name="P51" style:family="paragraph" style:parent-style-name="Standard">
      <style:text-properties style:font-name="Arial narrow" officeooo:paragraph-rsid="0036368f"/>
    </style:style>
    <style:style style:name="P52" style:family="paragraph" style:parent-style-name="Standard">
      <style:text-properties officeooo:paragraph-rsid="00266aec"/>
    </style:style>
    <style:style style:name="P53" style:family="paragraph" style:parent-style-name="Standard">
      <style:text-properties officeooo:paragraph-rsid="000f08a6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a88" officeooo:paragraph-rsid="001df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49b" officeooo:paragraph-rsid="001e74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officeooo:rsid="000b037d" officeooo:paragraph-rsid="000b0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officeooo:rsid="003abe8e" officeooo:paragraph-rsid="003abe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List_20_Paragraph" style:list-style-name="WWNum1">
      <style:paragraph-properties fo:margin-left="0.501cm" fo:margin-right="0cm" fo:margin-top="0cm" fo:margin-bottom="0.353cm" loext:contextual-spacing="true" fo:line-height="115%" fo:text-align="justify" style:justify-single-word="false" fo:text-indent="-0.501cm" style:auto-text-indent="false" style:writing-mode="lr-tb"/>
      <style:text-properties style:font-name="Arial Narrow" fo:font-size="12pt" fo:font-weight="bold" officeooo:paragraph-rsid="00041a1e" style:font-size-asian="12pt" style:font-weight-asian="bold" style:font-size-complex="12pt" style:font-weight-complex="bold"/>
    </style:style>
    <style:style style:name="P61" style:family="paragraph" style:parent-style-name="List_20_Paragraph" style:list-style-name="WWNum2">
      <style:paragraph-properties fo:margin-left="1cm" fo:margin-right="0cm" fo:margin-top="0.423cm" fo:margin-bottom="0cm" loext:contextual-spacing="true" fo:line-height="115%" fo:text-align="justify" style:justify-single-word="false" fo:text-indent="-0.499cm" style:auto-text-indent="false" style:writing-mode="lr-tb"/>
      <style:text-properties officeooo:paragraph-rsid="00041a1e"/>
    </style:style>
    <style:style style:name="P62" style:family="paragraph" style:parent-style-name="No_20_Spacing" style:list-style-name="WWNum1">
      <style:paragraph-properties fo:margin-left="0.501cm" fo:margin-right="0cm" fo:line-height="115%" fo:text-align="justify" style:justify-single-word="false" fo:text-indent="-0.501cm" style:auto-text-indent="false"/>
      <style:text-properties officeooo:paragraph-rsid="00041a1e"/>
    </style:style>
    <style:style style:name="P6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auto" style:writing-mode="lr-tb"/>
      <style:text-properties officeooo:paragraph-rsid="00041a1e"/>
    </style:style>
    <style:style style:name="P64" style:family="paragraph" style:parent-style-name="Standard" style:list-style-name="L1">
      <style:text-properties style:font-name="Arial narrow" fo:font-weight="bold" officeooo:paragraph-rsid="00072921" style:font-weight-asian="bold" style:font-weight-complex="bold"/>
    </style:style>
    <style:style style:name="P65" style:family="paragraph" style:parent-style-name="Standard" style:list-style-name="L2">
      <style:text-properties style:font-name="Arial narrow" officeooo:paragraph-rsid="00067bfe"/>
    </style:style>
    <style:style style:name="P66" style:family="paragraph" style:parent-style-name="Standard">
      <style:text-properties style:font-name="Arial narrow" officeooo:paragraph-rsid="00067bfe"/>
    </style:style>
    <style:style style:name="P67" style:family="paragraph" style:parent-style-name="Standard" style:list-style-name="L3">
      <style:text-properties style:text-position="0% 100%" style:font-name="Arial narrow" fo:font-weight="bold" officeooo:rsid="000c3259" officeooo:paragraph-rsid="00067bfe" style:font-weight-asian="bold" style:font-weight-complex="bold"/>
    </style:style>
    <style:style style:name="P68" style:family="paragraph" style:parent-style-name="Standard" style:list-style-name="L4">
      <style:text-properties style:text-position="0% 100%" style:font-name="Arial narrow" fo:font-weight="bold" officeooo:rsid="000c3259" officeooo:paragraph-rsid="000b037d" style:font-weight-asian="bold" style:font-weight-complex="bold"/>
    </style:style>
    <style:style style:name="P69" style:family="paragraph" style:parent-style-name="Standard" style:list-style-name="L5">
      <style:text-properties fo:color="#000000" style:font-name="Arial narrow" fo:font-size="12pt" style:text-underline-style="none" fo:font-weight="bold" officeooo:paragraph-rsid="000c7249" style:font-size-asian="12pt" style:font-weight-asian="bold" style:font-size-complex="12pt" style:font-weight-complex="bold"/>
    </style:style>
    <style:style style:name="P70" style:family="paragraph" style:parent-style-name="Standard" style:list-style-name="L6">
      <style:text-properties fo:color="#000000" style:font-name="Arial narrow" fo:font-size="12pt" style:text-underline-style="none" fo:font-weight="bold" officeooo:paragraph-rsid="000c7249" style:font-size-asian="12pt" style:font-weight-asian="bold" style:font-size-complex="12pt" style:font-weight-complex="bold"/>
    </style:style>
    <style:style style:name="P71" style:family="paragraph" style:parent-style-name="Standard" style:list-style-name="L7">
      <style:text-properties fo:color="#000000" style:font-name="Arial narrow" fo:font-size="12pt" style:text-underline-style="none" fo:font-weight="bold" officeooo:paragraph-rsid="000c7249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3426" style:font-size-asian="12pt" style:font-size-complex="12pt"/>
    </style:style>
    <style:style style:name="T4" style:family="text">
      <style:text-properties fo:font-size="12pt" officeooo:rsid="0014e2fe" style:font-size-asian="12pt" style:font-size-complex="12pt"/>
    </style:style>
    <style:style style:name="T5" style:family="text">
      <style:text-properties fo:font-size="12pt" officeooo:rsid="0028f405" style:font-size-asian="12pt" style:font-size-complex="12pt"/>
    </style:style>
    <style:style style:name="T6" style:family="text">
      <style:text-properties fo:font-size="12pt" officeooo:rsid="00292dd8" style:font-size-asian="12pt" style:font-size-complex="12pt"/>
    </style:style>
    <style:style style:name="T7" style:family="text">
      <style:text-properties fo:font-size="12pt" officeooo:rsid="002a5846" style:font-size-asian="12pt" style:font-size-complex="12pt"/>
    </style:style>
    <style:style style:name="T8" style:family="text">
      <style:text-properties fo:font-size="12pt" officeooo:rsid="00210d0b" style:font-size-asian="12pt" style:font-size-complex="12pt"/>
    </style:style>
    <style:style style:name="T9" style:family="text">
      <style:text-properties fo:font-size="12pt" officeooo:rsid="002eed34" style:font-size-asian="12pt" style:font-size-complex="12pt"/>
    </style:style>
    <style:style style:name="T10" style:family="text">
      <style:text-properties fo:font-size="12pt" officeooo:rsid="0032e4b9" style:font-size-asian="12pt" style:font-size-complex="12pt"/>
    </style:style>
    <style:style style:name="T11" style:family="text">
      <style:text-properties style:font-name="Arial Narrow" fo:font-size="12pt" style:font-size-asian="12pt" style:font-size-complex="12pt"/>
    </style:style>
    <style:style style:name="T12" style:family="text">
      <style:text-properties style:font-name="Arial Narrow" fo:font-size="12pt" style:font-size-asian="12pt" style:font-size-complex="12pt" style:font-weight-complex="bold"/>
    </style:style>
    <style:style style:name="T13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Arial Narrow" fo:font-size="11pt" style:font-size-asian="11pt" style:font-size-complex="11pt"/>
    </style:style>
    <style:style style:name="T15" style:family="text">
      <style:text-properties style:font-name="Arial Narrow" fo:font-size="11pt" style:font-size-asian="11pt" style:font-size-complex="11pt" style:font-weight-complex="bold"/>
    </style:style>
    <style:style style:name="T16" style:family="text"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Arial Narrow" fo:font-weight="bold" style:font-weight-asian="bold" style:font-weight-complex="bold"/>
    </style:style>
    <style:style style:name="T18" style:family="text">
      <style:text-properties style:font-name="Arial Narrow" style:font-weight-complex="bold"/>
    </style:style>
    <style:style style:name="T19" style:family="text">
      <style:text-properties style:font-name="Abyssinica SIL" fo:font-size="12pt" style:font-size-asian="12pt" style:font-size-complex="12pt"/>
    </style:style>
    <style:style style:name="T20" style:family="text">
      <style:text-properties style:font-name="Abyssinica SIL" fo:font-size="12pt" style:text-underline-style="solid" style:text-underline-type="double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Abyssinica SIL" fo:font-size="12pt" fo:font-weight="bold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Abyssinica SIL" fo:font-size="14pt" fo:font-weight="bold" style:font-name-asian="新細明體" style:font-size-asian="14pt" style:font-weight-asian="bold" style:font-size-complex="14pt"/>
    </style:style>
    <style:style style:name="T23" style:family="text">
      <style:text-properties style:font-name="Abyssinica SIL" fo:font-size="14pt" style:text-underline-style="solid" style:text-underline-width="auto" style:text-underline-color="font-color" fo:font-weight="bold" style:font-name-asian="新細明體" style:font-size-asian="14pt" style:font-weight-asian="bold" style:font-size-complex="14pt"/>
    </style:style>
    <style:style style:name="T24" style:family="text">
      <style:text-properties style:font-name="Abyssinica SIL" fo:font-size="14pt" style:text-underline-style="solid" style:text-underline-width="bold" style:text-underline-color="font-color" style:font-name-asian="新細明體" style:font-size-asian="14pt" style:font-size-complex="14pt"/>
    </style:style>
    <style:style style:name="T25" style:family="text">
      <style:text-properties style:font-name="Abyssinica SIL" fo:font-size="14pt" style:text-underline-style="solid" style:text-underline-width="bold" style:text-underline-color="font-color" style:font-name-asian="新細明體" style:font-size-asian="14pt" style:font-name-complex="Times New Roman1" style:font-size-complex="14pt"/>
    </style:style>
    <style:style style:name="T26" style:family="text">
      <style:text-properties style:font-name="Abyssinica SIL" fo:font-size="14pt" style:font-name-asian="新細明體" style:font-size-asian="14pt" style:font-size-complex="14pt"/>
    </style:style>
    <style:style style:name="T27" style:family="text">
      <style:text-properties style:font-name="Abyssinica SIL" fo:font-size="14pt" style:font-name-asian="新細明體" style:font-size-asian="14pt" style:font-name-complex="Times New Roman1" style:font-size-complex="14pt"/>
    </style:style>
    <style:style style:name="T28" style:family="text">
      <style:text-properties style:font-name="Abyssinica SIL" fo:font-size="14pt" officeooo:rsid="00041a1e" style:font-name-asian="新細明體" style:font-size-asian="14pt" style:font-name-complex="Times New Roman1" style:font-size-complex="14pt"/>
    </style:style>
    <style:style style:name="T29" style:family="text">
      <style:text-properties style:font-name="Abyssinica SIL" fo:font-size="14pt" style:font-size-asian="14pt" style:font-name-complex="Times New Roman1" style:font-size-complex="14pt"/>
    </style:style>
    <style:style style:name="T30" style:family="text">
      <style:text-properties style:font-name="Abyssinica SIL" fo:font-size="14pt" officeooo:rsid="0023cd5a" style:font-size-asian="14pt" style:font-name-complex="Times New Roman1" style:font-size-complex="14pt"/>
    </style:style>
    <style:style style:name="T31" style:family="text">
      <style:text-properties style:font-name="Abyssinica SIL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byssinica SIL" fo:font-size="13pt" fo:font-weight="bold" style:font-size-asian="13pt" style:font-weight-asian="bold" style:font-name-complex="Times New Roman1" style:font-size-complex="13pt" style:font-weight-complex="bold"/>
    </style:style>
    <style:style style:name="T33" style:family="text">
      <style:text-properties style:font-name="Abyssinica SIL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34" style:family="text">
      <style:text-properties style:font-name="Abyssinica SIL" fo:font-size="16pt" style:text-underline-style="none" fo:font-weight="bold" style:font-size-asian="16pt" style:font-weight-asian="bold" style:font-name-complex="Times New Roman1" style:font-size-complex="16pt" style:font-weight-complex="bold"/>
    </style:style>
    <style:style style:name="T35" style:family="text">
      <style:text-properties fo:color="#000000" style:font-name="Abyssinica SIL" fo:font-size="12pt" fo:font-weight="bold" style:font-size-asian="12pt" style:font-weight-asian="bold" style:font-size-complex="12pt"/>
    </style:style>
    <style:style style:name="T36" style:family="text">
      <style:text-properties fo:color="#000000" style:font-name="Abyssinica SIL" fo:font-size="12pt" style:text-underline-style="none" fo:font-weight="bold" style:font-size-asian="12pt" style:font-weight-asian="bold" style:font-size-complex="12pt"/>
    </style:style>
    <style:style style:name="T37" style:family="text">
      <style:text-properties fo:color="#000000" fo:font-size="12pt" style:text-underline-style="none" style:font-size-asian="12pt" style:font-size-complex="12pt"/>
    </style:style>
    <style:style style:name="T38" style:family="text">
      <style:text-properties fo:color="#000000" fo:font-size="12pt" style:text-underline-style="none" officeooo:rsid="000c7249" style:font-size-asian="12pt" style:font-size-complex="12pt"/>
    </style:style>
    <style:style style:name="T39" style:family="text">
      <style:text-properties fo:color="#000000" fo:font-size="12pt" style:text-underline-style="none" fo:font-weight="normal" officeooo:rsid="000c3259" style:font-size-asian="12pt" style:font-weight-asian="normal" style:font-size-complex="12pt" style:font-weight-complex="normal"/>
    </style:style>
    <style:style style:name="T40" style:family="text">
      <style:text-properties fo:color="#000000" style:font-name="Arial narrow" fo:font-size="12pt" style:text-underline-style="none" fo:font-weight="normal" style:font-size-asian="12pt" style:font-weight-asian="normal" style:font-size-complex="12pt" style:font-weight-complex="normal"/>
    </style:style>
    <style:style style:name="T41" style:family="text">
      <style:text-properties fo:color="#000000" style:font-name="Arial narrow" fo:font-size="12pt" style:text-underline-style="none" fo:font-weight="normal" officeooo:rsid="002d17ca" style:font-size-asian="12pt" style:font-weight-asian="normal" style:font-size-complex="12pt" style:font-weight-complex="normal"/>
    </style:style>
    <style:style style:name="T42" style:family="text">
      <style:text-properties fo:color="#000000" style:text-position="0% 100%" style:font-name="Arial narrow" fo:font-size="12pt" style:text-underline-style="none" fo:font-weight="normal" officeooo:rsid="000c3259" style:font-size-asian="12pt" style:font-weight-asian="normal" style:font-size-complex="12pt" style:font-weight-complex="normal"/>
    </style:style>
    <style:style style:name="T43" style:family="text">
      <style:text-properties style:text-position="super 58%"/>
    </style:style>
    <style:style style:name="T44" style:family="text">
      <style:text-properties style:text-position="super 58%" officeooo:rsid="000c3259"/>
    </style:style>
    <style:style style:name="T45" style:family="text">
      <style:text-properties style:text-position="super 58%" officeooo:rsid="0015f58a"/>
    </style:style>
    <style:style style:name="T46" style:family="text">
      <style:text-properties style:text-position="super 58%" style:font-name="Arial narrow"/>
    </style:style>
    <style:style style:name="T47" style:family="text">
      <style:text-properties style:text-position="super 58%" officeooo:rsid="00216a1e"/>
    </style:style>
    <style:style style:name="T48" style:family="text">
      <style:text-properties style:text-position="super 58%" fo:font-size="12pt" officeooo:rsid="00292dd8" style:font-size-asian="12pt" style:font-size-complex="12pt"/>
    </style:style>
    <style:style style:name="T49" style:family="text">
      <style:text-properties style:text-position="super 58%" officeooo:rsid="00321551"/>
    </style:style>
    <style:style style:name="T50" style:family="text">
      <style:text-properties style:text-position="super 58%" officeooo:rsid="0035f89b"/>
    </style:style>
    <style:style style:name="T51" style:family="text">
      <style:text-properties style:use-window-font-color="true" style:font-name="Arial Narrow" fo:font-size="12pt" fo:language="fr" fo:country="FR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52" style:family="text">
      <style:text-properties style:text-position="sub 58%"/>
    </style:style>
    <style:style style:name="T53" style:family="text">
      <style:text-properties style:text-position="sub 58%" officeooo:rsid="000c3259"/>
    </style:style>
    <style:style style:name="T54" style:family="text">
      <style:text-properties style:text-position="sub 58%" officeooo:rsid="000f0d61"/>
    </style:style>
    <style:style style:name="T55" style:family="text">
      <style:text-properties style:text-position="sub 58%" officeooo:rsid="000a414b"/>
    </style:style>
    <style:style style:name="T56" style:family="text">
      <style:text-properties style:text-position="sub 58%" officeooo:rsid="0014e2fe"/>
    </style:style>
    <style:style style:name="T57" style:family="text">
      <style:text-properties style:text-position="sub 58%" officeooo:rsid="0015f58a"/>
    </style:style>
    <style:style style:name="T58" style:family="text">
      <style:text-properties style:text-position="sub 58%" officeooo:rsid="00179692"/>
    </style:style>
    <style:style style:name="T59" style:family="text">
      <style:text-properties style:text-position="sub 58%" officeooo:rsid="001995e9"/>
    </style:style>
    <style:style style:name="T60" style:family="text">
      <style:text-properties style:text-position="sub 58%" style:font-name="Arial narrow" officeooo:rsid="001dfa88"/>
    </style:style>
    <style:style style:name="T61" style:family="text">
      <style:text-properties style:text-position="sub 58%" style:font-name="Arial narrow" officeooo:rsid="00103426"/>
    </style:style>
    <style:style style:name="T62" style:family="text">
      <style:text-properties style:text-position="sub 58%" style:font-name="Arial narrow" officeooo:rsid="001ed766"/>
    </style:style>
    <style:style style:name="T63" style:family="text">
      <style:text-properties style:text-position="sub 58%" style:font-name="Arial narrow" fo:font-size="12pt" officeooo:rsid="0032e4b9" style:font-size-asian="12pt" style:font-size-complex="12pt"/>
    </style:style>
    <style:style style:name="T64" style:family="text">
      <style:text-properties style:text-position="sub 58%" fo:font-size="12pt" style:font-size-asian="12pt" style:font-size-complex="12pt"/>
    </style:style>
    <style:style style:name="T65" style:family="text">
      <style:text-properties style:text-position="sub 58%" fo:font-size="12pt" officeooo:rsid="00292dd8" style:font-size-asian="12pt" style:font-size-complex="12pt"/>
    </style:style>
    <style:style style:name="T66" style:family="text">
      <style:text-properties style:text-position="sub 58%" fo:font-size="12pt" officeooo:rsid="002a5846" style:font-size-asian="12pt" style:font-size-complex="12pt"/>
    </style:style>
    <style:style style:name="T67" style:family="text">
      <style:text-properties style:text-position="sub 58%" officeooo:rsid="00321551"/>
    </style:style>
    <style:style style:name="T68" style:family="text">
      <style:text-properties style:text-position="sub 58%" officeooo:rsid="0036cec4"/>
    </style:style>
    <style:style style:name="T69" style:family="text">
      <style:text-properties officeooo:rsid="000c3259"/>
    </style:style>
    <style:style style:name="T70" style:family="text">
      <style:text-properties style:text-position="0% 100%" officeooo:rsid="000c3259"/>
    </style:style>
    <style:style style:name="T71" style:family="text">
      <style:text-properties style:text-position="0% 100%" officeooo:rsid="000f0d61"/>
    </style:style>
    <style:style style:name="T72" style:family="text">
      <style:text-properties style:text-position="0% 100%" officeooo:rsid="0014e2fe"/>
    </style:style>
    <style:style style:name="T73" style:family="text">
      <style:text-properties style:text-position="0% 100%" officeooo:rsid="0015f58a"/>
    </style:style>
    <style:style style:name="T74" style:family="text">
      <style:text-properties style:text-position="0% 100%" officeooo:rsid="00179692"/>
    </style:style>
    <style:style style:name="T75" style:family="text">
      <style:text-properties style:text-position="0% 100%" officeooo:rsid="001a475e"/>
    </style:style>
    <style:style style:name="T76" style:family="text">
      <style:text-properties style:text-position="0% 100%" fo:font-weight="bold" officeooo:rsid="000c3259" style:font-weight-asian="bold" style:font-weight-complex="bold"/>
    </style:style>
    <style:style style:name="T77" style:family="text">
      <style:text-properties style:text-position="0% 100%" fo:font-weight="bold" officeooo:rsid="001995e9" style:font-weight-asian="bold" style:font-weight-complex="bold"/>
    </style:style>
    <style:style style:name="T78" style:family="text">
      <style:text-properties style:text-position="0% 100%" fo:font-weight="bold" officeooo:rsid="001b61af" style:font-weight-asian="bold" style:font-weight-complex="bold"/>
    </style:style>
    <style:style style:name="T79" style:family="text">
      <style:text-properties style:text-position="0% 100%" officeooo:rsid="001dfa88"/>
    </style:style>
    <style:style style:name="T80" style:family="text">
      <style:text-properties style:text-position="0% 100%" fo:font-size="12pt" style:font-size-asian="12pt" style:font-size-complex="12pt"/>
    </style:style>
    <style:style style:name="T81" style:family="text">
      <style:text-properties style:text-position="0% 100%" fo:font-size="12pt" officeooo:rsid="00292dd8" style:font-size-asian="12pt" style:font-size-complex="12pt"/>
    </style:style>
    <style:style style:name="T82" style:family="text">
      <style:text-properties style:text-position="0% 100%" fo:font-size="12pt" officeooo:rsid="002a5846" style:font-size-asian="12pt" style:font-size-complex="12pt"/>
    </style:style>
    <style:style style:name="T83" style:family="text">
      <style:text-properties style:text-position="0% 100%" fo:font-size="12pt" officeooo:rsid="002b46b5" style:font-size-asian="12pt" style:font-size-complex="12pt"/>
    </style:style>
    <style:style style:name="T84" style:family="text">
      <style:text-properties style:text-position="0% 100%" style:font-name="Arial narrow" fo:font-size="12pt" officeooo:rsid="000c3259" style:font-size-asian="12pt" style:font-size-complex="12pt"/>
    </style:style>
    <style:style style:name="T85" style:family="text">
      <style:text-properties style:text-position="0% 100%" style:font-name="Arial narrow" fo:font-size="12pt" officeooo:rsid="0032e4b9" style:font-size-asian="12pt" style:font-size-complex="12pt"/>
    </style:style>
    <style:style style:name="T86" style:family="text">
      <style:text-properties style:text-position="0% 100%" style:font-name="Arial narrow" officeooo:rsid="00103426"/>
    </style:style>
    <style:style style:name="T87" style:family="text">
      <style:text-properties style:text-position="0% 100%" style:font-name="Arial narrow" officeooo:rsid="002d17ca"/>
    </style:style>
    <style:style style:name="T88" style:family="text">
      <style:text-properties style:text-position="0% 100%" style:font-name="Arial narrow" officeooo:rsid="0002b4c2"/>
    </style:style>
    <style:style style:name="T89" style:family="text">
      <style:text-properties style:text-position="0% 100%" style:font-name="Arial narrow" officeooo:rsid="0005bfb9"/>
    </style:style>
    <style:style style:name="T90" style:family="text">
      <style:text-properties style:text-position="0% 100%" style:font-name="Arial narrow" officeooo:rsid="001ed766"/>
    </style:style>
    <style:style style:name="T91" style:family="text">
      <style:text-properties style:text-position="0% 100%" style:font-name="Arial narrow" officeooo:rsid="002d5e23"/>
    </style:style>
    <style:style style:name="T92" style:family="text">
      <style:text-properties style:text-position="0% 100%" style:font-name="Arial narrow" officeooo:rsid="002eed34"/>
    </style:style>
    <style:style style:name="T93" style:family="text">
      <style:text-properties style:text-position="0% 100%" officeooo:rsid="00103426"/>
    </style:style>
    <style:style style:name="T94" style:family="text">
      <style:text-properties style:text-position="0% 100%" style:font-name="Liberation Serif1" officeooo:rsid="002d5e23" style:font-name-asian="Liberation Serif1" style:font-name-complex="Liberation Serif1"/>
    </style:style>
    <style:style style:name="T95" style:family="text">
      <style:text-properties style:text-position="0% 100%" officeooo:rsid="002d5e23"/>
    </style:style>
    <style:style style:name="T96" style:family="text">
      <style:text-properties style:text-position="0% 100%" officeooo:rsid="00321551"/>
    </style:style>
    <style:style style:name="T97" style:family="text">
      <style:text-properties style:text-position="0% 100%" officeooo:rsid="0035f89b"/>
    </style:style>
    <style:style style:name="T98" style:family="text">
      <style:text-properties style:text-position="0% 100%" officeooo:rsid="0036cec4"/>
    </style:style>
    <style:style style:name="T99" style:family="text">
      <style:text-properties officeooo:rsid="00072921"/>
    </style:style>
    <style:style style:name="T100" style:family="text">
      <style:text-properties officeooo:rsid="00081d1f"/>
    </style:style>
    <style:style style:name="T101" style:family="text">
      <style:text-properties officeooo:rsid="00097974"/>
    </style:style>
    <style:style style:name="T102" style:family="text">
      <style:text-properties officeooo:rsid="000b037d"/>
    </style:style>
    <style:style style:name="T103" style:family="text">
      <style:text-properties officeooo:rsid="0002b4c2"/>
    </style:style>
    <style:style style:name="T104" style:family="text">
      <style:text-properties officeooo:rsid="00071972"/>
    </style:style>
    <style:style style:name="T105" style:family="text">
      <style:text-properties officeooo:rsid="00103426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officeooo:rsid="0014e2fe"/>
    </style:style>
    <style:style style:name="T108" style:family="text">
      <style:text-properties officeooo:rsid="001995e9"/>
    </style:style>
    <style:style style:name="T109" style:family="text">
      <style:text-properties officeooo:rsid="001a475e"/>
    </style:style>
    <style:style style:name="T110" style:family="text">
      <style:text-properties officeooo:rsid="001b61af"/>
    </style:style>
    <style:style style:name="T111" style:family="text">
      <style:text-properties style:font-name="Arial narrow"/>
    </style:style>
    <style:style style:name="T112" style:family="text">
      <style:text-properties style:font-name="Arial narrow" officeooo:rsid="001dfa88"/>
    </style:style>
    <style:style style:name="T113" style:family="text">
      <style:text-properties style:font-name="Arial narrow" fo:font-size="12pt" style:font-size-asian="12pt" style:font-size-complex="12pt"/>
    </style:style>
    <style:style style:name="T114" style:family="text">
      <style:text-properties style:font-name="Arial narrow" officeooo:rsid="00357d30"/>
    </style:style>
    <style:style style:name="T115" style:family="text">
      <style:text-properties style:font-name="AR PL Mingti2L Big5"/>
    </style:style>
    <style:style style:name="T116" style:family="text">
      <style:text-properties style:font-name="AR PL Mingti2L Big5" officeooo:rsid="001e749b"/>
    </style:style>
    <style:style style:name="T117" style:family="text">
      <style:text-properties officeooo:rsid="001e749b"/>
    </style:style>
    <style:style style:name="T118" style:family="text">
      <style:text-properties officeooo:rsid="002b9ff9"/>
    </style:style>
    <style:style style:name="T119" style:family="text">
      <style:text-properties officeooo:rsid="002d17ca"/>
    </style:style>
    <style:style style:name="T120" style:family="text">
      <style:text-properties officeooo:rsid="002d5e23"/>
    </style:style>
    <style:style style:name="T121" style:family="text">
      <style:text-properties style:font-name="Liberation Serif1" officeooo:rsid="002d5e23" style:font-name-asian="Liberation Serif1" style:font-name-complex="Liberation Serif1"/>
    </style:style>
    <style:style style:name="T122" style:family="text">
      <style:text-properties officeooo:rsid="002d5e23" style:font-name-asian="Noto Serif CJK SC" style:font-name-complex="Lohit Devanagari"/>
    </style:style>
    <style:style style:name="T123" style:family="text">
      <style:text-properties style:font-name="Z003" fo:font-size="12pt" fo:font-weight="bold" style:font-size-asian="12pt" style:font-weight-asian="bold" style:font-size-complex="12pt" style:font-weight-complex="bold"/>
    </style:style>
    <style:style style:name="T124" style:family="text">
      <style:text-properties style:font-name="Z003" fo:font-size="12pt" fo:font-weight="bold" officeooo:rsid="002eed34" style:font-size-asian="12pt" style:font-weight-asian="bold" style:font-size-complex="12pt" style:font-weight-complex="bold"/>
    </style:style>
    <style:style style:name="T125" style:family="text">
      <style:text-properties officeooo:rsid="00321551"/>
    </style:style>
    <style:style style:name="T126" style:family="text">
      <style:text-properties officeooo:rsid="00357d30"/>
    </style:style>
    <style:style style:name="T127" style:family="text">
      <style:text-properties officeooo:rsid="0035f89b"/>
    </style:style>
    <style:style style:name="T128" style:family="text">
      <style:text-properties officeooo:rsid="0038c92d"/>
    </style:style>
    <style:style style:name="T129" style:family="text">
      <style:text-properties officeooo:rsid="003ab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318cm, 2.656cm, 4.24cm, 0.3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22">CEG OKOUN SEME <text:s text:c="5"/></text:span><draw:frame draw:style-name="fr2" draw:name="Image 20" text:anchor-type="char" svg:x="6.724cm" svg:y="-0.074cm" svg:width="2.889cm" svg:height="2.536cm" draw:z-index="0"><draw:image xlink:href="Pictures/10000000000001BA0000023152F9B31759BEB589.jpg" xlink:type="simple" xlink:show="embed" xlink:actuate="onLoad" loext:mime-type="image/jpeg"/><svg:desc>Description : Description : Albatrose</svg:desc></draw:frame><text:span text:style-name="T22"><text:s text:c="23"/></text:span><text:span text:style-name="T23">Année Scolaire :</text:span><text:span text:style-name="T22"> 2023-2024</text:span></text:p>
      <text:p text:style-name="P2"><text:span text:style-name="T24">Tél</text:span><text:span text:style-name="T26"> :</text:span><text:span text:style-name="T29"> </text:span><text:span text:style-name="T30">94 41 21 32 </text:span><text:span text:style-name="T26"><text:s text:c="44"/></text:span><text:span text:style-name="T25">Classe</text:span><text:span text:style-name="T27">: <text:s/></text:span><text:span text:style-name="T28">TleD</text:span></text:p>
      <text:p text:style-name="P2"><text:span text:style-name="T29">BP 17 Sèmè-Podji</text:span><text:span text:style-name="T26"> <text:s text:c="42"/></text:span><text:span text:style-name="T25">Durée</text:span><text:span text:style-name="T27">: </text:span><text:span text:style-name="T28">4</text:span><text:span text:style-name="T27">heures</text:span></text:p>
      <text:p text:style-name="P27"><text:s text:c="2"/></text:p>
      <text:p text:style-name="P26"><text:span text:style-name="T20">PREMIÈRE SERIE DE PRODUCTIONS SCOLAIRES DU PREMIER SEMESTRE</text:span><text:span text:style-name="T32"> <text:s text:c="34"/></text:span><text:span text:style-name="T21"><text:s/></text:span></text:p>
      <text:p text:style-name="P28"><text:span text:style-name="T31"><text:s/></text:span><text:span text:style-name="T33">EPREUVE</text:span><text:span text:style-name="T34"> : PCT <text:s text:c="2"/></text:span><text:span text:style-name="T31"><text:s text:c="7"/></text:span></text:p>
      <text:list xml:id="list648331670" text:style-name="WWNum1">
        <text:list-item>
          <text:p text:style-name="P60">Compétences disciplinaire évaluée:</text:p>
        </text:list-item>
      </text:list>
      <text:list xml:id="list2691865726" text:style-name="WWNum2">
        <text:list-item>
          <text:p text:style-name="P61"><text:span text:style-name="T13">CD 1:</text:span><text:span text:style-name="T12"> </text:span><text:span text:style-name="T14">Elaborer une explication d’un fait ou d’un phénomène de son environnement naturel ou construit en mettant en œuvre les modes de raisonnement propres à la physique, à la chimie et à la technologie</text:span></text:p>
        </text:list-item>
        <text:list-item>
          <text:p text:style-name="P61"><text:span text:style-name="T51">CD</text:span><text:span text:style-name="T13">2 </text:span><text:span text:style-name="T11">: </text:span><text:span text:style-name="T14">Exploiter la physique, la chimie et la démarche technologique dans la production, l’utilisation et la réparation d’objets technologiques</text:span></text:p>
        </text:list-item>
        <text:list-item>
          <text:p text:style-name="P61"><text:span text:style-name="T16">CD3 </text:span><text:span text:style-name="T14">: Apprécier l'apport de la physique, la chimie et de la technologie à la vie de l'homme</text:span></text:p>
        </text:list-item>
      </text:list>
      <text:list xml:id="list234307378944828" text:continue-list="list648331670" text:style-name="WWNum1">
        <text:list-item>
          <text:p text:style-name="P62"><text:span text:style-name="T17">Compétence transversale évaluée</text:span><text:span text:style-name="T18"> </text:span><text:span text:style-name="T17">:</text:span><text:span text:style-name="T18"> </text:span><text:span text:style-name="T15">Communiquer de façon précise et appropriée.</text:span></text:p>
        </text:list-item>
      </text:list>
      <text:p text:style-name="P3"><text:span text:style-name="T11"><text:s text:c="33"/></text:span><text:span text:style-name="T19"><text:s text:c="5"/></text:span><text:span text:style-name="T35">A/</text:span><text:span text:style-name="T36">CHIMIE ET TECHNOLOGIE</text:span></text:p>
      <text:p text:style-name="P25">Contexte</text:p>
      <text:p text:style-name="P43">Les médicaments dénommés antiacides sont utilisés pour soigner les brûlures d’estomac en</text:p>
      <text:p text:style-name="P43">neutralisant leur acidité. Ces médicaments, comme ceux de la marque Maalox, sont généralement</text:p>
      <text:p text:style-name="P43">des hydroxydes métalliques.</text:p>
      <text:p text:style-name="P43">Un élève stagiaire d’une société est appelé à faire une analyse d’un comprimé antiacide. <text:span text:style-name="T100">Dans le laboratoire de la société existe une série de solutions aqueuses </text:span><text:span text:style-name="T110">dont certaines n’ont pas d’étiquette </text:span><text:span text:style-name="T101">et un mélange particulier M préparé par le technicien pour d’autre fin </text:span><text:span text:style-name="T105">utile.</text:span></text:p>
      <text:p text:style-name="P44">Support</text:p>
      <text:list xml:id="list3258842363" text:style-name="L1">
        <text:list-item>
          <text:p text:style-name="P64">Analyse du comprimé </text:p>
        </text:list-item>
      </text:list>
      <text:p text:style-name="P43">- La solution d’acide sulfurique utilisée est préparée en prélevant, un volume</text:p>
      <text:p text:style-name="P43"><text:span text:style-name="T69">V</text:span><text:span text:style-name="T53">0 </text:span>= 10,0 cm³<text:span text:style-name="T44"> <text:s/></text:span>d’acide sulfurique pur de masse volumique <text:span text:style-name="T69">ρ = 1,80g.cm</text:span><text:span text:style-name="T44">-3 </text:span>qu’on verse dans une fiole jaugée de</text:p>
      <text:p text:style-name="P43"><text:s/>1,0 L <text:s/>et complète le volume avec de l<text:span text:style-name="T99">’eau distillée</text:span>. On obtient une <text:s/><text:span text:style-name="T69">solution S</text:span><text:span text:style-name="T53">1</text:span><text:span text:style-name="T70"> de concentration C</text:span><text:span text:style-name="T53">1</text:span><text:span text:style-name="T70"> . On prélève ensuite un volume V</text:span><text:span text:style-name="T53">1</text:span><text:span text:style-name="T70"> de la solution S</text:span><text:span text:style-name="T53">1 </text:span><text:span text:style-name="T70">d’acide </text:span>sulfurique qu’on verse dans une fiole jaugée de 50<text:span text:style-name="T69">cm</text:span><text:span text:style-name="T44">3</text:span><text:span text:style-name="T43"> </text:span><text:s/>puis on complète avec de l’eau distillée. On obtient une solution <text:span text:style-name="T69">S</text:span><text:span text:style-name="T53">a </text:span>de concentration <text:span text:style-name="T69">C</text:span><text:span text:style-name="T53">a </text:span>= 5,0.<text:span text:style-name="T69">10</text:span><text:span text:style-name="T44">-2</text:span><text:span text:style-name="T70"> mol.L</text:span><text:span text:style-name="T44">-1 </text:span>à 25°C. <text:s/><text:span text:style-name="T99">L’</text:span>élève stagiaire <text:span text:style-name="T125">prépare une solution S en mélangeant :</text:span></text:p>
      <text:p text:style-name="P50">- <text:span text:style-name="T125">V</text:span><text:span text:style-name="T67">a</text:span><text:span text:style-name="T96"> = 50ml de la solution S</text:span><text:span text:style-name="T67">a</text:span><text:span text:style-name="T96"> de concentration molaire C</text:span><text:span text:style-name="T67">a </text:span><text:span text:style-name="T96">;</text:span></text:p>
      <text:p text:style-name="P50"><text:span text:style-name="T96">- V</text:span><text:span text:style-name="T67">b</text:span><text:span text:style-name="T96"> = 100cm</text:span><text:span text:style-name="T49">3</text:span><text:span text:style-name="T96"> d’une solution S</text:span><text:span text:style-name="T67">b </text:span><text:span text:style-name="T96">d’hydroxyde de magnésium (Mg</text:span><text:span text:style-name="T49">2+ </text:span><text:span text:style-name="T96">, 2OH</text:span><text:span text:style-name="T49">-</text:span><text:span text:style-name="T96"> ) </text:span><text:span text:style-name="T70">de concentration </text:span><text:span text:style-name="T71">C</text:span><text:span text:style-name="T54">b</text:span><text:span text:style-name="T71"> = </text:span><text:span text:style-name="T70">10</text:span><text:span text:style-name="T44">-2</text:span><text:span text:style-name="T70">mol.L</text:span><text:span text:style-name="T44">-1 </text:span><text:span text:style-name="T70">;</text:span><text:span text:style-name="T96"> </text:span></text:p>
      <text:p text:style-name="P50"><text:span text:style-name="T96">- V’</text:span><text:span text:style-name="T67">b </text:span><text:span text:style-name="T96">= 50 cm³</text:span><text:span text:style-name="T49"> </text:span><text:span text:style-name="T70">d’une solution </text:span><text:span text:style-name="T96">S’</text:span><text:span text:style-name="T67">b</text:span><text:span text:style-name="T70"> d’hydroxyde de sodium (Na</text:span><text:span text:style-name="T44">+</text:span><text:span text:style-name="T70"> , OH</text:span><text:span text:style-name="T44">- </text:span><text:span text:style-name="T70">) de concentration </text:span><text:span text:style-name="T71">C’</text:span><text:span text:style-name="T54">b</text:span><text:span text:style-name="T71"> = 5,0.</text:span><text:span text:style-name="T70">10</text:span><text:span text:style-name="T44">-2</text:span><text:span text:style-name="T70">mol.L</text:span><text:span text:style-name="T44">-1 </text:span><text:span text:style-name="T70">.</text:span></text:p>
      <text:list xml:id="list3689599552" text:style-name="L2">
        <text:list-item>
          <text:p text:style-name="P65"><text:span text:style-name="T76">L</text:span><text:span text:style-name="T77">iste d</text:span><text:span text:style-name="T76">es solutions contenues dans </text:span><text:span text:style-name="T78">d</text:span><text:span text:style-name="T76">es flacons </text:span><text:span text:style-name="T78">sans étiquette</text:span><text:span text:style-name="T76"> </text:span><text:span text:style-name="T77">au laboratoire</text:span></text:p>
        </text:list-item>
      </text:list>
      <text:p text:style-name="P43"><text:span text:style-name="T70">S</text:span><text:span text:style-name="T55">2</text:span><text:span text:style-name="T70"> : Solution de sulfate d’ammonium (NH4 )</text:span><text:span text:style-name="T53">2</text:span><text:span text:style-name="T70">SO</text:span><text:span text:style-name="T53">4</text:span></text:p>
      <text:p text:style-name="P43"><text:span text:style-name="T70">S</text:span><text:span text:style-name="T55">3</text:span><text:span text:style-name="T70"> : Solution d’acide méthanoïque (HCOOH)</text:span></text:p>
      <text:p text:style-name="P43"><text:span text:style-name="T70">S</text:span><text:span text:style-name="T55">4</text:span><text:span text:style-name="T70"> : Solution d’ammoniac (NH</text:span><text:span text:style-name="T53">3</text:span><text:span text:style-name="T70"> )</text:span></text:p>
      <text:p text:style-name="P43"><text:span text:style-name="T70">S</text:span><text:span text:style-name="T59">5</text:span><text:span text:style-name="T70"> : solution de méthanoate de sodium (HCOONa)</text:span></text:p>
      <text:p text:style-name="P32">Toutes les <text:span text:style-name="T129">quatre</text:span> solutions ont la même concentration molaire C inconnue.</text:p>
      <text:p text:style-name="P32">Les mesures du pH des solutions contenues dans chaque flacon ont donné les valeurs consignées</text:p>
      <text:p text:style-name="P32">tableau ci-dessous :</text:p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7">Flacons</text:p>
          </table:table-cell>
          <table:table-cell table:style-name="Tableau1.A1" office:value-type="string">
            <text:p text:style-name="P58"><text:s/><text:span text:style-name="T102">A</text:span></text:p>
          </table:table-cell>
          <table:table-cell table:style-name="Tableau1.A1" office:value-type="string">
            <text:p text:style-name="P57">B</text:p>
          </table:table-cell>
          <table:table-cell table:style-name="Tableau1.A1" office:value-type="string">
            <text:p text:style-name="P57">D</text:p>
          </table:table-cell>
          <table:table-cell table:style-name="Tableau1.E1" office:value-type="string">
            <text:p text:style-name="P59">E</text:p>
          </table:table-cell>
        </table:table-row>
        <table:table-row table:style-name="Tableau1.1">
          <table:table-cell table:style-name="Tableau1.A2" office:value-type="string">
            <text:p text:style-name="P57">pH</text:p>
          </table:table-cell>
          <table:table-cell table:style-name="Tableau1.A2" office:value-type="string">
            <text:p text:style-name="P57">10,60</text:p>
          </table:table-cell>
          <table:table-cell table:style-name="Tableau1.A2" office:value-type="string">
            <text:p text:style-name="P57">5,44</text:p>
          </table:table-cell>
          <table:table-cell table:style-name="Tableau1.A2" office:value-type="string">
            <text:p text:style-name="P57">2,90</text:p>
          </table:table-cell>
          <table:table-cell table:style-name="Tableau1.E2" office:value-type="string">
            <text:p text:style-name="P57">7,90</text:p>
          </table:table-cell>
        </table:table-row>
      </table:table>
      <text:p text:style-name="P32">Pour déterminer la valeur de la molarité commune C des solutions contenues dans les flacons, on</text:p>
      <text:p text:style-name="P32">ajoute à un volume V= 20 mL du flacon B, une solution de chlorure de baryum en excès. Il se</text:p>
      <text:p text:style-name="P32">forme un précipité blanc qui ne noircit pas à la lumière. Le précipité lavé et séché a une masse</text:p>
      <text:p text:style-name="P32"><text:soft-page-break/>m=46,6 mg.</text:p>
      <text:list xml:id="list1466576671" text:style-name="L3">
        <text:list-item>
          <text:p text:style-name="P67"><text:s/>Informations sur le mélange M</text:p>
        </text:list-item>
      </text:list>
      <text:p text:style-name="P35">Le mélange M est obtenu à partir de V<text:span text:style-name="T52">B</text:span> = 100 mL d’une solution de soude (NaOH) de concentration </text:p>
      <text:p text:style-name="P35">C<text:span text:style-name="T52">B</text:span> = 2.10<text:span text:style-name="T43">-1</text:span> mol/L et V<text:span text:style-name="T52">A</text:span> = 200 mL d’une solution d’acide éthanoïque (CH<text:span text:style-name="T52">3</text:span>COOH) de concentration </text:p>
      <text:p text:style-name="P35">C<text:span text:style-name="T52">A</text:span> = 10<text:span text:style-name="T43">-1</text:span> mol/L. la mesure du pH du mélange donne 8,8.</text:p>
      <text:list xml:id="list1990000852" text:style-name="L4">
        <text:list-item>
          <text:p text:style-name="P68">Autres données </text:p>
        </text:list-item>
      </text:list>
      <text:p text:style-name="P45">Toutes les solutions sont à 25°C et pKe = 14</text:p>
      <text:p text:style-name="P45">On donne : Masses molaires en g.mol<text:span text:style-name="T43">-1</text:span> : H : 1 ; O : 16 ; Na : 23 ; Mg : 24,3 ; <text:span text:style-name="T70">S : 32 ; O : 16 ; Ba : 137 </text:span>.</text:p>
      <text:p text:style-name="P32">On donne en g/mol : pka (HCOOH/HCOO<text:span text:style-name="T43">- </text:span>) = 3,8</text:p>
      <text:p text:style-name="P33"><text:span text:style-name="T106">Tâche</text:span> : Expliquer des faits et décrire l’utilisation du matériel approprié</text:p>
      <text:p text:style-name="P17">Partie 1 : Mobilisation des ressources</text:p>
      <text:p text:style-name="P19">1.</text:p>
      <text:p text:style-name="P14"><text:span text:style-name="T2">1.1. </text:span><text:span text:style-name="T3">Définir : </text:span><text:span text:style-name="T5">acide</text:span><text:span text:style-name="T4"> forte et base faible</text:span></text:p>
      <text:p text:style-name="P21">1.2 <text:s/><text:span text:style-name="T107">Décrire le mode opératoire de préparation de la solution S</text:span><text:span text:style-name="T56">1 </text:span><text:span text:style-name="T72">après avoir citer le matériel utilisé.</text:span></text:p>
      <text:p text:style-name="P21">1.3 <text:s/><text:span text:style-name="T109">E</text:span>crire les équations des réactions des solutés des différentes solutions <text:span text:style-name="T109">de la liste</text:span> avec l’eau.</text:p>
      <text:p text:style-name="P17">Partie 2 : Résolution de problème</text:p>
      <text:p text:style-name="P19">2.</text:p>
      <text:p text:style-name="P12"><text:span text:style-name="T2">2.1. Montrer que la concentration de la solution </text:span><text:span text:style-name="T6">S</text:span><text:span text:style-name="T65">1</text:span><text:span text:style-name="T81"> est C</text:span><text:span text:style-name="T65">1</text:span><text:span text:style-name="T81"> = 1,83.10</text:span><text:span text:style-name="T48">-1</text:span><text:span text:style-name="T81"> mol.L</text:span><text:span text:style-name="T48">-1</text:span><text:span text:style-name="T81"> et en déduire </text:span>le volume V<text:span text:style-name="T52">1</text:span> prélevé de la solution S<text:span text:style-name="T52">1</text:span> pour préparer la solution S<text:span text:style-name="T52">a</text:span> . </text:p>
      <text:p text:style-name="P6"><text:span text:style-name="T84">2.2. </text:span><text:span text:style-name="T42">Calculer</text:span><text:span text:style-name="T85"> les pH</text:span><text:span text:style-name="T63">1</text:span><text:span text:style-name="T85">, pH</text:span><text:span text:style-name="T63">2</text:span><text:span text:style-name="T85"> et pH</text:span><text:span text:style-name="T63">3</text:span><text:span text:style-name="T85"> respectifs des solutions S</text:span><text:span text:style-name="T63">a</text:span><text:span text:style-name="T85">, S</text:span><text:span text:style-name="T63">b</text:span><text:span text:style-name="T85"> et S’</text:span><text:span text:style-name="T63">b</text:span><text:span text:style-name="T84">.</text:span></text:p>
      <text:p text:style-name="P9">2.3 <text:span text:style-name="T10">Déterminer la nature et le pH de la solution S</text:span><text:span text:style-name="T39">.</text:span></text:p>
      <text:p text:style-name="P7">3.</text:p>
      <text:p text:style-name="P13"><text:span text:style-name="T74">3</text:span><text:span text:style-name="T73">.1 Justifier que le flacon B contient la solution S</text:span><text:span text:style-name="T58">2</text:span><text:span text:style-name="T73"> et montrer que la concentration molaire commune aux </text:span><text:span text:style-name="T98">quatre</text:span><text:span text:style-name="T73"> solutions est C = 10</text:span><text:span text:style-name="T45">-2</text:span><text:span text:style-name="T73"> mol/L.</text:span></text:p>
      <text:p text:style-name="P13"><text:span text:style-name="T75">3</text:span><text:span text:style-name="T73">.2 Montrer que le pH de la solution S</text:span><text:span text:style-name="T68">2</text:span><text:span text:style-name="T73"> est donné par la relation </text:span><text:span text:style-name="T73"><draw:frame draw:style-name="fr3" draw:name="Objet11" text:anchor-type="as-char" svg:y="-0.619cm" svg:width="4.083cm" svg:height="0.998cm" draw:z-index="6"><draw:object xlink:href="./Object 11" xlink:type="simple" xlink:show="embed" xlink:actuate="onLoad"/><draw:image xlink:href="./ObjectReplacements/Object 11" xlink:type="simple" xlink:show="embed" xlink:actuate="onLoad"/></draw:frame></text:span><text:span text:style-name="T73">(on</text:span></text:p>
      <text:p text:style-name="P13"><text:span text:style-name="T73">indiquera les approximations utilisées) et en déduire le pka du couple 𝑁𝐻</text:span><text:span text:style-name="T57">4</text:span><text:span text:style-name="T45">+</text:span><text:span text:style-name="T73"> /𝑁𝐻</text:span><text:span text:style-name="T57">3</text:span><text:span text:style-name="T73"> .</text:span><text:span text:style-name="T75"> </text:span><text:span text:style-name="T73">Identifier le contenu de chaque flacon.</text:span></text:p>
      <text:p text:style-name="P31"><text:span text:style-name="T108">3.</text:span><text:span text:style-name="T109">3</text:span><text:span text:style-name="T108"> </text:span>Calculer les molarités des espèces chimiques présentes dans le mélange M.</text:p>
      <text:p text:style-name="P36"/>
      <text:p text:style-name="P40">B- PHYSIQUE ET TECHNOLOGIE</text:p>
      <text:p text:style-name="P41">Contexte </text:p>
      <text:p text:style-name="P37">Pour renforcer les capacités de ses apprenants lors d’une séance d’intégration, le</text:p>
      <text:p text:style-name="P46"><text:span text:style-name="T37">professeur de PCT </text:span><text:span text:style-name="T38">M. SAM </text:span><text:span text:style-name="T37"><text:s/>propose </text:span><text:span text:style-name="T38">à ses apprenants de terminale scientifique </text:span><text:span text:style-name="T37">trois axes thématiques : cinématique, champ magnétique et mouvement du centre d’inertie d’un solide.</text:span></text:p>
      <text:p text:style-name="P41">Support</text:p>
      <text:list xml:id="list4244344545" text:style-name="L5">
        <text:list-item>
          <text:p text:style-name="P69">Etude cinématique d’un mobile ponctuel M</text:p>
        </text:list-item>
      </text:list>
      <text:p text:style-name="P37">Deux automobiles se suivent à 28m l’un de l’autre à la vitesse constante de 86,4 km/h.</text:p>
      <text:p text:style-name="P37">La première voiture freine avec une décélération de 7,7𝑚. 𝑠<text:span text:style-name="T43">−2 </text:span>la seconde, manquant d’adhérence, avec une décélération de 4, 2𝑚. 𝑠<text:span text:style-name="T43">-</text:span><text:span text:style-name="T47">2</text:span> . On suppose que les deux conducteurs commencent à freiner simultanément.</text:p>
      <text:list xml:id="list3645065245" text:style-name="L6">
        <text:list-item>
          <text:p text:style-name="P70">Etude d’un champ magnétique créé dans un solénoïde</text:p>
        </text:list-item>
      </text:list>
      <text:p text:style-name="P37">L’axe d’un solénoïde est horizontal et orienté de telle manière qu’en absence de courant électrique,</text:p>
      <text:p text:style-name="P37">une aiguille aimantée lui soit perpendiculaire.</text:p>
      <text:p text:style-name="P37">Lorsqu’un courant électrique d’intensité I traverse le solénoïde, l’aiguille aimantée <text:span text:style-name="T128">sur pivot tournant autour d’un axe vertical </text:span>prend une nouvelle direction formant un angle 𝛼 par rapport à sa position initiale.</text:p>
      <text:p text:style-name="P37"><draw:frame draw:style-name="fr1" draw:name="Image2" text:anchor-type="char" svg:x="0.328cm" svg:y="0.051cm" svg:width="16.074cm" svg:height="4.479cm" draw:z-index="5"><draw:image xlink:href="Pictures/10000201000002AE0000009DE39C39A3D988C5A2.png" xlink:type="simple" xlink:show="embed" xlink:actuate="onLoad" loext:mime-type="image/png"/></draw:frame><text:soft-page-break/>Les différentes valeurs de l’intensité I du courant et de l’angle 𝛼 sont consignées dans le tableau</text:p>
      <text:p text:style-name="P37">suivant : </text:p>
      <table:table table:name="Tableau2" table:style-name="Tableau2" table:template-name="Style par défaut">
        <table:table-column table:style-name="Tableau2.A" table:number-columns-repeated="6"/>
        <table:table-column table:style-name="Tableau2.G"/>
        <table:table-row table:style-name="TableLine94023978204960">
          <table:table-cell table:style-name="Tableau2.A1" office:value-type="string">
            <text:p text:style-name="P55">I(A)</text:p>
          </table:table-cell>
          <table:table-cell table:style-name="Tableau2.A1" office:value-type="string">
            <text:p text:style-name="P56">0</text:p>
          </table:table-cell>
          <table:table-cell table:style-name="Tableau2.A1" office:value-type="string">
            <text:p text:style-name="P56">0,01</text:p>
          </table:table-cell>
          <table:table-cell table:style-name="Tableau2.A1" office:value-type="string">
            <text:p text:style-name="P56">0,02</text:p>
          </table:table-cell>
          <table:table-cell table:style-name="Tableau2.A1" office:value-type="string">
            <text:p text:style-name="P56">0,03</text:p>
          </table:table-cell>
          <table:table-cell table:style-name="Tableau2.A1" office:value-type="string">
            <text:p text:style-name="P56">0,04</text:p>
          </table:table-cell>
          <table:table-cell table:style-name="Tableau2.G1" office:value-type="string">
            <text:p text:style-name="P56">0,05</text:p>
          </table:table-cell>
        </table:table-row>
        <table:table-row table:style-name="TableLine94023978240592">
          <table:table-cell table:style-name="Tableau2.A2" office:value-type="string">
            <text:p text:style-name="P55"><text:span text:style-name="T115">α</text:span>(<text:span text:style-name="T117">°)</text:span></text:p>
          </table:table-cell>
          <table:table-cell table:style-name="Tableau2.A2" office:value-type="string">
            <text:p text:style-name="P56">0</text:p>
          </table:table-cell>
          <table:table-cell table:style-name="Tableau2.A2" office:value-type="string">
            <text:p text:style-name="P56">32</text:p>
          </table:table-cell>
          <table:table-cell table:style-name="Tableau2.A2" office:value-type="string">
            <text:p text:style-name="P56">51</text:p>
          </table:table-cell>
          <table:table-cell table:style-name="Tableau2.A2" office:value-type="string">
            <text:p text:style-name="P56">62</text:p>
          </table:table-cell>
          <table:table-cell table:style-name="Tableau2.A2" office:value-type="string">
            <text:p text:style-name="P56">68</text:p>
          </table:table-cell>
          <table:table-cell table:style-name="Tableau2.G2" office:value-type="string">
            <text:p text:style-name="P56">72</text:p>
          </table:table-cell>
        </table:table-row>
        <table:table-row table:style-name="TableLine94023975523952">
          <table:table-cell table:style-name="Tableau2.A2" office:value-type="string">
            <text:p text:style-name="P54"><text:s/><text:span text:style-name="T117">tan</text:span><text:span text:style-name="T116">α</text:span></text:p>
          </table:table-cell>
          <table:table-cell table:style-name="Tableau2.A2" office:value-type="string">
            <text:p text:style-name="P54"/>
          </table:table-cell>
          <table:table-cell table:style-name="Tableau2.A2" office:value-type="string">
            <text:p text:style-name="P54"/>
          </table:table-cell>
          <table:table-cell table:style-name="Tableau2.A2" office:value-type="string">
            <text:p text:style-name="P54"/>
          </table:table-cell>
          <table:table-cell table:style-name="Tableau2.A2" office:value-type="string">
            <text:p text:style-name="P54"/>
          </table:table-cell>
          <table:table-cell table:style-name="Tableau2.A2" office:value-type="string">
            <text:p text:style-name="P54"/>
          </table:table-cell>
          <table:table-cell table:style-name="Tableau2.G2" office:value-type="string">
            <text:p text:style-name="P54"/>
          </table:table-cell>
        </table:table-row>
      </table:table>
      <text:p text:style-name="P37"/>
      <text:p text:style-name="P37">Le solénoïde comporte n = 1000 spires par mètre ; 𝜇<text:span text:style-name="T52">0</text:span> = 4𝜋. 10<text:span text:style-name="T43">−7</text:span> SI</text:p>
      <text:p text:style-name="P38"><draw:frame draw:style-name="fr3" draw:name="Objet2" text:anchor-type="as-char" svg:y="-0.427cm" svg:width="0.601cm" svg:height="0.58cm" draw:z-index="7"><draw:object xlink:href="./Object 6" xlink:type="simple" xlink:show="embed" xlink:actuate="onLoad"/><draw:image xlink:href="./ObjectReplacements/Object 6" xlink:type="simple" xlink:show="embed" xlink:actuate="onLoad"/></draw:frame><text:s/>est le vecteur champ magnétique créé par le solénoïde</text:p>
      <text:p text:style-name="P38"><draw:frame draw:style-name="fr3" draw:name="Objet5" text:anchor-type="as-char" svg:y="-0.427cm" svg:width="0.619cm" svg:height="0.58cm" draw:z-index="9"><draw:object xlink:href="./Object 7" xlink:type="simple" xlink:show="embed" xlink:actuate="onLoad"/><draw:image xlink:href="./ObjectReplacements/Object 7" xlink:type="simple" xlink:show="embed" xlink:actuate="onLoad"/></draw:frame>est la composante horizontale du vecteur champ magnétique terrestre.</text:p>
      <text:p text:style-name="P37">Echelle : 1 cm pour 0,01 A et 1 cm pour tan 𝛼 = 0,6</text:p>
      <text:list xml:id="list45815459" text:style-name="L7">
        <text:list-item>
          <text:p text:style-name="P71">Mouvement du centre d’inertie d’un solide<draw:frame draw:style-name="fr1" draw:name="Image1" text:anchor-type="char" svg:x="8.747cm" svg:y="0.065cm" svg:width="9.527cm" svg:height="7.075cm" draw:z-index="3"><draw:image xlink:href="Pictures/10000201000001FD0000017AAAB93972C58433AA.png" xlink:type="simple" xlink:show="embed" xlink:actuate="onLoad" loext:mime-type="image/png"/></draw:frame></text:p>
        </text:list-item>
      </text:list>
      <text:p text:style-name="P48">Une gouttière ABC sert de parcours à un mobile </text:p>
      <text:p text:style-name="P48">supposé ponctuel, de masse m=100g. </text:p>
      <text:p text:style-name="P48">Le mouvement a lieu dans un plan vertical. </text:p>
      <text:p text:style-name="P48">Sa partie curviligne AB est un arc de cercle </text:p>
      <text:p text:style-name="P48">parfaitement <text:span text:style-name="T103">lisse (</text:span><draw:frame draw:style-name="fr3" draw:name="Objet1" text:anchor-type="as-char" svg:y="-0.429cm" svg:width="1.572cm" svg:height="0.52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) = <draw:frame draw:style-name="fr3" draw:name="Objet3" text:anchor-type="as-char" svg:y="-0.473cm" svg:width="0.631cm" svg:height="0.85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𝑟𝑎𝑑 ; </text:p>
      <text:p text:style-name="P48">Le mobile est lancé en A avec une vitesse </text:p>
      <text:p text:style-name="P52"><text:span text:style-name="T112">v</text:span><text:span text:style-name="T60">A </text:span><text:span text:style-name="T111">= 5𝑚. 𝑠</text:span><text:span text:style-name="T46">−1 </text:span><text:span text:style-name="T111">verticale dirigé vers le bas et </text:span></text:p>
      <text:p text:style-name="P48">glisse sur la portion AB.</text:p>
      <text:p text:style-name="P53"><text:span text:style-name="T111">La portion BC rectiligne et horizontale est rugueuse. Les frottements peuvent être assimilés à une force </text:span><text:span text:style-name="T111"><draw:frame draw:style-name="fr3" draw:name="Objet6" text:anchor-type="as-char" svg:y="-0.446cm" svg:width="0.404cm" svg:height="0.53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11"><text:s/>unique, constante, opposée au mouvement d’intensité f. </text:span><text:span text:style-name="T114">Il</text:span><text:span text:style-name="T111"> arrive en C avec une vitesse</text:span></text:p>
      <text:p text:style-name="P42"><text:span text:style-name="T79">v</text:span><text:span text:style-name="T52">𝐶</text:span> = 5𝑚. 𝑠<text:span text:style-name="T43">−1</text:span> . </text:p>
      <text:p text:style-name="P42">En C, le mobile quitte la piste avec sa vitesse <text:span text:style-name="T126">v</text:span><text:span text:style-name="T52">𝐶</text:span> .</text:p>
      <text:p text:style-name="P51">On donne : 𝑟 = 𝑂𝐴 = 𝑂𝐵 = 1𝑚, <text:span text:style-name="T127">g = 10N.kg</text:span><text:span text:style-name="T50">-1</text:span><text:span text:style-name="T97">, BC=3m.</text:span></text:p>
      <text:p text:style-name="P34"><text:span text:style-name="T106">Tâche</text:span> : Expliquer des faits et décrire l’utilisation du matériel approprié</text:p>
      <text:p text:style-name="P18">Partie 1 : Mobilisation des ressources</text:p>
      <text:p text:style-name="P20">1. <text:span text:style-name="T118">Choisir la bonne réponse</text:span></text:p>
      <text:p text:style-name="P15"><text:span text:style-name="T2">1.1. </text:span><text:span text:style-name="T7">L’équation horaire d’un mouvement rectiligne uniformément varié pour t</text:span><text:span text:style-name="T66">0</text:span><text:span text:style-name="T82"> = 0s est  </text:span><text:span text:style-name="T83">donnée par la relation </text:span><text:span text:style-name="T82">:</text:span></text:p>
      <text:p text:style-name="P24"><text:span text:style-name="T82">a</text:span><text:span text:style-name="T80">) </text:span><text:span text:style-name="T80"><draw:frame draw:style-name="fr3" draw:name="Objet13" text:anchor-type="as-char" svg:y="-0.377cm" svg:width="2.092cm" svg:height="0.531cm" draw:z-index="19"><draw:object xlink:href="./Object 13" xlink:type="simple" xlink:show="embed" xlink:actuate="onLoad"/><draw:image xlink:href="./ObjectReplacements/Object 13" xlink:type="simple" xlink:show="embed" xlink:actuate="onLoad"/></draw:frame></text:span><text:span text:style-name="T64"><text:s text:c="22"/></text:span><text:span text:style-name="T80">b) <text:s/></text:span><text:span text:style-name="T80"><draw:frame draw:style-name="fr3" draw:name="Objet12" text:anchor-type="as-char" svg:y="-0.619cm" svg:width="3.565cm" svg:height="0.998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80"><text:s text:c="2"/>c) <text:s/></text:span><text:span text:style-name="T80"><draw:frame draw:style-name="fr3" draw:name="Objet14" text:anchor-type="as-char" svg:y="-0.377cm" svg:width="2.122cm" svg:height="0.531cm" draw:z-index="1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2">1.2 <text:span text:style-name="T118">A l’intérieur d’un solénoïde traversé par un courant électrique le champ magnétique est :</text:span></text:p>
      <text:p text:style-name="P23">a) Uniforme <text:s text:c="8"/>b) <text:s/>uniformément varié <text:s text:c="4"/>c) <text:s text:c="2"/>nul</text:p>
      <text:p text:style-name="P22">1.3 <text:s text:c="2"/><text:span text:style-name="T118">Le Théorème du centre d’inertie appliqué à un projectile donne :</text:span></text:p>
      <text:p text:style-name="P23">a) <draw:frame draw:style-name="fr3" draw:name="Objet15" text:anchor-type="as-char" svg:y="-0.427cm" svg:width="2.009cm" svg:height="0.517cm" draw:z-index="11"><draw:object xlink:href="./Object 15" xlink:type="simple" xlink:show="embed" xlink:actuate="onLoad"/><draw:image xlink:href="./ObjectReplacements/Object 15" xlink:type="simple" xlink:show="embed" xlink:actuate="onLoad"/></draw:frame><text:s text:c="3"/>b) <text:s/><draw:frame draw:style-name="fr3" draw:name="Objet16" text:anchor-type="as-char" svg:y="-0.427cm" svg:width="1.427cm" svg:height="0.517cm" draw:z-index="12"><draw:object xlink:href="./Object 16" xlink:type="simple" xlink:show="embed" xlink:actuate="onLoad"/><draw:image xlink:href="./ObjectReplacements/Object 16" xlink:type="simple" xlink:show="embed" xlink:actuate="onLoad"/><svg:desc>formule</svg:desc></draw:frame><text:s text:c="2"/>c) <draw:frame draw:style-name="fr3" draw:name="Objet17" text:anchor-type="as-char" svg:y="-0.427cm" svg:width="1.438cm" svg:height="0.517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18">Partie 2 : Résolution de problème</text:p>
      <text:p text:style-name="P20">2.</text:p>
      <text:p text:style-name="P4"><text:soft-page-break/><text:span text:style-name="T113">2.1 </text:span><text:span text:style-name="T40">Montrer que les véhicules se heurtent </text:span><text:span text:style-name="T41">et d</text:span><text:span text:style-name="T40">éterminer leur vitesse relative au moment du choc.</text:span><text:span text:style-name="T41"> Déterminer</text:span><text:span text:style-name="T40"> la décélération minimale </text:span><text:span text:style-name="T41">à appliquer</text:span><text:span text:style-name="T40"> </text:span><text:span text:style-name="T41">a</text:span><text:span text:style-name="T40">u second véhicule pour éviter le choc.</text:span></text:p>
      <text:p text:style-name="P11"><text:span text:style-name="T2">2.</text:span><text:span text:style-name="T9">2</text:span><text:span text:style-name="T2"> Représenter les vecteurs champs magnétiques </text:span><text:span text:style-name="T2"><draw:frame draw:style-name="fr3" draw:name="Objet8" text:anchor-type="as-char" svg:y="-0.427cm" svg:width="0.601cm" svg:height="0.58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8">et </text:span><text:span text:style-name="T8"><draw:frame draw:style-name="fr3" draw:name="Objet9" text:anchor-type="as-char" svg:y="-0.427cm" svg:width="0.619cm" svg:height="0.58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">ainsi que le vecteur champ magnétique</text:span><text:span text:style-name="T2"> résultant </text:span><text:span text:style-name="T2"><draw:frame draw:style-name="fr3" draw:name="Objet10" text:anchor-type="as-char" svg:y="-0.427cm" svg:width="0.489cm" svg:height="0.517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<text:s/>puis indiquer le sens de circulation du courant électrique dans le solénoïde.</text:span></text:p>
      <text:p text:style-name="P5"><text:span text:style-name="T92">2.</text:span><text:span text:style-name="T86">3 Tracer le graphe tan α = f(I) puis exprimer B</text:span><text:span text:style-name="T61">h </text:span><text:span text:style-name="T86">en fonction de I et tanα.Calculer la valeur de B</text:span><text:span text:style-name="T61">h</text:span><text:span text:style-name="T86"> </text:span></text:p>
      <text:p text:style-name="P10">3.</text:p>
      <text:p text:style-name="P5"><text:span text:style-name="T86">3.</text:span><text:span text:style-name="T91">1</text:span><text:span text:style-name="T86"> </text:span><text:span text:style-name="T94">► </text:span><text:span text:style-name="T86">Etablir l’expression littérale de la vitesse </text:span><text:span text:style-name="T87">v</text:span><text:span text:style-name="T61">𝑀</text:span><text:span text:style-name="T86"> du mobile en un point M tel que </text:span><text:span text:style-name="T88">(</text:span><text:span text:style-name="T86"><draw:frame draw:style-name="fr3" draw:name="Objet4" text:anchor-type="as-char" svg:y="-0.429cm" svg:width="1.683cm" svg:height="0.52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86">) </text:span><text:span text:style-name="T89">= θ</text:span><text:span text:style-name="T88">, en fonction de </text:span><text:span text:style-name="T90">v</text:span><text:span text:style-name="T62">A</text:span><text:span text:style-name="T90"> </text:span><text:span text:style-name="T88">, </text:span><text:span text:style-name="T86">g, r et 𝜃. Calculer numériquement </text:span><text:span text:style-name="T91">v</text:span><text:span text:style-name="T61">𝑀</text:span><text:span text:style-name="T86"> en B.</text:span></text:p>
      <text:p text:style-name="P8"><text:s text:c="6"/><text:span text:style-name="T121">►</text:span><text:span text:style-name="T122"> </text:span>Etablir l’expression littérale de la réaction R de la piste sur le mobile en M en fonction de m, g, 𝜃, r et <text:span text:style-name="T119">v</text:span><text:span text:style-name="T52">𝐴</text:span> .Calculer numériquement R en B.</text:p>
      <text:p text:style-name="P16"><text:span text:style-name="T93">3.</text:span><text:span text:style-name="T95">2</text:span><text:span text:style-name="T93"> </text:span><text:span text:style-name="T94">►</text:span><text:span text:style-name="T93"> Calculer littéralement puis numériquement f.</text:span></text:p>
      <text:p text:style-name="P49"><text:s text:c="6"/><text:span text:style-name="T121">►</text:span> Calculer l’accélération du mobile et en déduire la nature <text:span text:style-name="T93">de son mouvement.</text:span></text:p>
      <text:p text:style-name="P49">3.<text:span text:style-name="T120">3</text:span> <text:span text:style-name="T121">►</text:span>Etablir, dans le repère (<draw:frame draw:style-name="fr3" draw:name="Objet7" text:anchor-type="as-char" svg:y="-0.429cm" svg:width="1.379cm" svg:height="0.52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04">) l’équation de sa trajectoire.</text:span></text:p>
      <text:p text:style-name="P49"><text:s text:c="6"/><text:span text:style-name="T121">►</text:span>Calculer la distance CD où D est le point d’impact du mobile.</text:p>
      <text:p text:style-name="P39"/>
      <text:p text:style-name="P47"><text:s/></text:p>
      <text:p text:style-name="P47"/>
      <text:p text:style-name="P29"><text:span text:style-name="T123">BONNE </text:span><text:span text:style-name="T124">COMPOSITION</text:span></text:p>
      <text:p text:style-name="P30">FIN</text:p>
      <text:p text:style-name="P47"><text:s/></text:p>
      <text:p text:style-name="P3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 PL Mingti2L Big5" svg:font-family="'AR PL Mingti2L Big5'"/>
    <style:font-face style:name="Courier New" svg:font-family="'Courier New'"/>
    <style:font-face style:name="Lohit Devanagari1" svg:font-family="'Lohit Devanagari'"/>
    <style:font-face style:name="Liberation Serif1" svg:font-family="'Liberation Serif'" style:font-family-generic="roman"/>
    <style:font-face style:name="Arial narrow" svg:font-family="'Arial narrow'" style:font-family-generic="swiss"/>
    <style:font-face style:name="Abyssinica SIL" svg:font-family="'Abyssinica SIL'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Z003" svg:font-family="Z003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MP1" style:family="paragraph" style:parent-style-name="Footer">
      <style:paragraph-properties fo:margin-top="0cm" fo:margin-bottom="0.282cm" loext:contextual-spacing="false" fo:text-align="center" style:justify-single-word="false"/>
      <style:text-properties officeooo:paragraph-rsid="0025c235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4</text:page-number></text:span><text:s/>sur 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19:35:48.643653998</meta:creation-date>
    <meta:generator>LibreOffice/6.4.7.2$Linux_X86_64 LibreOffice_project/40$Build-2</meta:generator>
    <dc:date>2023-12-16T23:43:05.159706369</dc:date>
    <meta:editing-duration>PT2H14M1S</meta:editing-duration>
    <meta:editing-cycles>32</meta:editing-cycles>
    <meta:document-statistic meta:table-count="2" meta:image-count="3" meta:object-count="17" meta:page-count="4" meta:paragraph-count="143" meta:word-count="1450" meta:character-count="8369" meta:non-whitespace-character-count="6767"/>
  </office:meta>
</office:document-meta>
</file>

<file path=Object 1/content.xml><?xml version="1.0" encoding="utf-8"?>
<math xmlns="http://www.w3.org/1998/Math/MathML" display="block">
  <semantics>
    <mrow>
      <mover accent="true">
        <mi mathvariant="italic">OA</mi>
        <mo stretchy="true">⃗</mo>
      </mover>
      <mi>,</mi>
      <mover accent="true">
        <mi mathvariant="italic">OB</mi>
        <mo stretchy="true">⃗</mo>
      </mover>
    </mrow>
    <annotation encoding="StarMath 5.0">widevec OA , widevec OB</annotation>
  </semantics>
</math>
</file>

<file path=Object 10/content.xml><?xml version="1.0" encoding="utf-8"?>
<math xmlns="http://www.w3.org/1998/Math/MathML" display="block">
  <semantics>
    <mover accent="true">
      <mi>B</mi>
      <mo stretchy="true">⃗</mo>
    </mover>
    <annotation encoding="StarMath 5.0">widevec B</annotation>
  </semantics>
</math>
</file>

<file path=Object 11/content.xml><?xml version="1.0" encoding="utf-8"?>
<math xmlns="http://www.w3.org/1998/Math/MathML" display="block">
  <semantics>
    <mrow>
      <mrow>
        <mi mathvariant="italic">pH</mi>
        <mo stretchy="false">=</mo>
        <mfrac>
          <mn>1</mn>
          <mn>2</mn>
        </mfrac>
      </mrow>
      <mrow>
        <mo fence="true" stretchy="false">(</mo>
        <mrow>
          <mrow>
            <mrow>
              <mi mathvariant="italic">pKa</mi>
              <mo stretchy="false">−</mo>
              <mi>log</mi>
            </mrow>
            <mn>2</mn>
            <mi>C</mi>
          </mrow>
        </mrow>
        <mo fence="true" stretchy="false">)</mo>
      </mrow>
    </mrow>
    <annotation encoding="StarMath 5.0">pH = 1over2 ( pKa - log 2C )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frac>
          <mn>1</mn>
          <mn>2</mn>
        </mfrac>
      </mrow>
      <msub>
        <mi>a</mi>
        <mi>x</mi>
      </msub>
      <mrow>
        <msup>
          <mi>t</mi>
          <mn>2</mn>
        </msup>
        <mo stretchy="false">+</mo>
        <msub>
          <mi>V</mi>
          <mrow>
            <mn>0</mn>
            <mi>x</mi>
          </mrow>
        </msub>
      </mrow>
      <mrow>
        <mi>t</mi>
        <mo stretchy="false">+</mo>
        <msub>
          <mi>x</mi>
          <mn>0</mn>
        </msub>
      </mrow>
    </mrow>
    <annotation encoding="StarMath 5.0">x = 1over2 a_x t^2 + V_{0x}t + x_0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sub>
          <mi>V</mi>
          <mi>x</mi>
        </msub>
      </mrow>
      <mrow>
        <mi>t</mi>
        <mo stretchy="false">+</mo>
        <msub>
          <mi>x</mi>
          <mn>0</mn>
        </msub>
      </mrow>
    </mrow>
    <annotation encoding="StarMath 5.0">x = V_{ x }t + x_0</annotation>
  </semantics>
</math>
</file>

<file path=Object 14/content.xml><?xml version="1.0" encoding="utf-8"?>
<math xmlns="http://www.w3.org/1998/Math/MathML" display="block">
  <semantics>
    <mrow>
      <mi>x</mi>
      <mo stretchy="false">=</mo>
      <mrow>
        <msub>
          <mi>V</mi>
          <mrow>
            <mn>0</mn>
            <mi>x</mi>
          </mrow>
        </msub>
        <mo stretchy="false">−</mo>
        <msub>
          <mi>x</mi>
          <mn>0</mn>
        </msub>
      </mrow>
    </mrow>
    <annotation encoding="StarMath 5.0">x = V_{ 0x } - x_0</annotation>
  </semantics>
</math>
</file>

<file path=Object 15/content.xml><?xml version="1.0" encoding="utf-8"?>
<math xmlns="http://www.w3.org/1998/Math/MathML" display="block">
  <semantics>
    <mrow>
      <mrow>
        <mrow>
          <mover accent="true">
            <mi>P</mi>
            <mo stretchy="false">⃗</mo>
          </mover>
          <mo stretchy="false">+</mo>
          <mover accent="true">
            <mi>T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vec P + vec T = m vec a</annotation>
  </semantics>
</math>
</file>

<file path=Object 16/content.xml><?xml version="1.0" encoding="utf-8"?>
<math xmlns="http://www.w3.org/1998/Math/MathML" display="block">
  <semantics>
    <mrow>
      <mrow>
        <mover accent="true">
          <mi>T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 vec T = m vec a</annotation>
  </semantics>
</math>
</file>

<file path=Object 17/content.xml><?xml version="1.0" encoding="utf-8"?>
<math xmlns="http://www.w3.org/1998/Math/MathML" display="block">
  <semantics>
    <mrow>
      <mrow>
        <mover accent="true">
          <mi>P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P  = m vec a</annotation>
  </semantics>
</math>
</file>

<file path=Object 2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3/content.xml><?xml version="1.0" encoding="utf-8"?>
<math xmlns="http://www.w3.org/1998/Math/MathML" display="block">
  <semantics>
    <mrow>
      <mover accent="true">
        <mi mathvariant="italic">OB</mi>
        <mo stretchy="true">⃗</mo>
      </mover>
      <mi>,</mi>
      <mover accent="true">
        <mi mathvariant="italic">OM</mi>
        <mo stretchy="true">⃗</mo>
      </mover>
    </mrow>
    <annotation encoding="StarMath 5.0">widevec OB , widevec OM</annotation>
  </semantics>
</math>
</file>

<file path=Object 4/content.xml><?xml version="1.0" encoding="utf-8"?>
<math xmlns="http://www.w3.org/1998/Math/MathML" display="block">
  <semantics>
    <mover accent="true">
      <mi>f</mi>
      <mo stretchy="true">⃗</mo>
    </mover>
    <annotation encoding="StarMath 5.0">widevec f</annotation>
  </semantics>
</math>
</file>

<file path=Object 5/content.xml><?xml version="1.0" encoding="utf-8"?>
<math xmlns="http://www.w3.org/1998/Math/MathML" display="block">
  <semantics>
    <mrow>
      <mover accent="true">
        <mi mathvariant="italic">Cx</mi>
        <mo stretchy="true">⃗</mo>
      </mover>
      <mi>,</mi>
      <mover accent="true">
        <mi mathvariant="italic">Cy</mi>
        <mo stretchy="true">⃗</mo>
      </mover>
    </mrow>
    <annotation encoding="StarMath 5.0">widevec Cx , widevec Cy</annotation>
  </semantics>
</math>
</file>

<file path=Object 6/content.xml><?xml version="1.0" encoding="utf-8"?>
<math xmlns="http://www.w3.org/1998/Math/MathML" display="block">
  <semantics>
    <mover accent="true">
      <msub>
        <mi>B</mi>
        <mi>s</mi>
      </msub>
      <mo stretchy="true">⃗</mo>
    </mover>
    <annotation encoding="StarMath 5.0">widevec B_s</annotation>
  </semantics>
</math>
</file>

<file path=Object 7/content.xml><?xml version="1.0" encoding="utf-8"?>
<math xmlns="http://www.w3.org/1998/Math/MathML" display="block">
  <semantics>
    <mover accent="true">
      <msub>
        <mi>B</mi>
        <mi>h</mi>
      </msub>
      <mo stretchy="true">⃗</mo>
    </mover>
    <annotation encoding="StarMath 5.0">widevec B_h</annotation>
  </semantics>
</math>
</file>

<file path=Object 8/content.xml><?xml version="1.0" encoding="utf-8"?>
<math xmlns="http://www.w3.org/1998/Math/MathML" display="block">
  <semantics>
    <mover accent="true">
      <msub>
        <mi>B</mi>
        <mi>s</mi>
      </msub>
      <mo stretchy="true">⃗</mo>
    </mover>
    <annotation encoding="StarMath 5.0">widevec B_s</annotation>
  </semantics>
</math>
</file>

<file path=Object 9/content.xml><?xml version="1.0" encoding="utf-8"?>
<math xmlns="http://www.w3.org/1998/Math/MathML" display="block">
  <semantics>
    <mover accent="true">
      <msub>
        <mi>B</mi>
        <mi>h</mi>
      </msub>
      <mo stretchy="true">⃗</mo>
    </mover>
    <annotation encoding="StarMath 5.0">widevec B_h</annotation>
  </semantics>
</math>
</file>