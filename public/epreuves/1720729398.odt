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0d61"/>
    </style:style>
    <style:style style:name="T1" style:family="text">
      <style:text-properties officeooo:rsid="000c325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3259"/>
    </style:style>
    <style:style style:name="T4" style:family="text">
      <style:text-properties style:text-position="super 58%" style:font-name="Liberation Serif" officeooo:rsid="000c3259"/>
    </style:style>
    <style:style style:name="T5" style:family="text">
      <style:text-properties style:text-position="super 58%" officeooo:rsid="000d207e"/>
    </style:style>
    <style:style style:name="T6" style:family="text">
      <style:text-properties style:text-position="super 58%" officeooo:rsid="000f0d61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c3259"/>
    </style:style>
    <style:style style:name="T9" style:family="text">
      <style:text-properties style:text-position="sub 58%" officeooo:rsid="000d207e"/>
    </style:style>
    <style:style style:name="T10" style:family="text">
      <style:text-properties style:text-position="sub 58%" officeooo:rsid="000f0d61"/>
    </style:style>
    <style:style style:name="T11" style:family="text">
      <style:text-properties style:font-name="Liberation Serif1" officeooo:rsid="000c3259"/>
    </style:style>
    <style:style style:name="T12" style:family="text">
      <style:text-properties style:font-name="Liberation Serif" officeooo:rsid="000c3259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c3259"/>
    </style:style>
    <style:style style:name="T15" style:family="text">
      <style:text-properties style:text-position="0% 100%" officeooo:rsid="000d207e"/>
    </style:style>
    <style:style style:name="T16" style:family="text">
      <style:text-properties style:text-position="0% 100%" officeooo:rsid="000f0d61"/>
    </style:style>
    <style:style style:name="T17" style:family="text">
      <style:text-properties officeooo:rsid="000d207e"/>
    </style:style>
    <style:style style:name="T18" style:family="text">
      <style:text-properties officeooo:rsid="000f0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Les médicaments dénommés antiacides sont utilisés pour soigner les brulures d’estomac en</text:p>
      <text:p text:style-name="Standard">neutralisant leur acidité. Ces médicaments, comme ceux de la marque Maalox, sont généralement</text:p>
      <text:p text:style-name="Standard">des hydroxydes métalliques.</text:p>
      <text:p text:style-name="Standard">Un élève stagiaire d’une société est appelé à faire une analyse d’un comprimé antiacide de masse</text:p>
      <text:p text:style-name="Standard">m = 125 g contenant de l’hydroxyde de magnésium (Mg 2+ , 2OH - ). Dans son analyse, il utilise de l’acide sulfurique H<text:span text:style-name="T7">2</text:span> SO<text:span text:style-name="T7">4</text:span> de masse molaire M = 98,0 g.<text:span text:style-name="T1">mol</text:span><text:span text:style-name="T3">-1</text:span></text:p>
      <text:p text:style-name="Standard">.</text:p>
      <text:p text:style-name="Standard">On donne : Masses molaires en g.mol<text:span text:style-name="T2">-1</text:span> : H : 1 ; O : 16 ; Na : 23 ; Mg : 24,3.</text:p>
      <text:p text:style-name="Standard">2.1 Préparation de la solution d’acide sulfurique :</text:p>
      <text:p text:style-name="Standard">La solution d’acide sulfurique utilisée est préparée en prélevant, à l’aide d’une pipette, un volume</text:p>
      <text:p text:style-name="Standard"><text:span text:style-name="T1">V</text:span><text:span text:style-name="T8">0 </text:span>= 10,0 cm³<text:span text:style-name="T3"> <text:s/></text:span>d’acide sulfurique pur de masse volumique <text:span text:style-name="T11">ρ</text:span><text:span text:style-name="T12"> = 1,80g.cm</text:span><text:span text:style-name="T4">-3 </text:span>qu’on verse dans</text:p>
      <text:p text:style-name="Standard">une fiole jaugée de 1,0 L. On complète avec de l’eau distillée jusqu’au trait de jauge. On obtient une <text:s/><text:span text:style-name="T1">solution S</text:span><text:span text:style-name="T8">1</text:span><text:span text:style-name="T14"> de concentration C</text:span><text:span text:style-name="T8">1</text:span><text:span text:style-name="T14"> . On prélève ensuite un volume V</text:span><text:span text:style-name="T8">1</text:span><text:span text:style-name="T14"> de la solution S</text:span><text:span text:style-name="T8">1 </text:span><text:span text:style-name="T14">d’acide </text:span>sulfurique qu’on verse dans une fiole jaugée de 50<text:span text:style-name="T1">cm</text:span><text:span text:style-name="T3">3</text:span><text:span text:style-name="T2"> </text:span><text:s/>puis on complète avec de l’eau distillée. On</text:p>
      <text:p text:style-name="Standard">obtient une solution <text:span text:style-name="T1">S</text:span><text:span text:style-name="T8">a </text:span>de concentration <text:span text:style-name="T1">C</text:span><text:span text:style-name="T8">a </text:span>= 5,0.<text:span text:style-name="T1">10</text:span><text:span text:style-name="T3">-2</text:span><text:span text:style-name="T14"> mol.L</text:span><text:span text:style-name="T3">-1 </text:span>à 25°C.</text:p>
      <text:p text:style-name="Standard">On donne le produit ionique de l’eau <text:span text:style-name="T1">Ke = 10</text:span><text:span text:style-name="T3">-14</text:span></text:p>
      <text:p text:style-name="Standard">2.1.1 L’acide sulfurique est considéré étant un diacide fort. Calculer le pH de la solution Sa. <text:s/></text:p>
      <text:p text:style-name="Standard">2.1.2 Montrer que la concentration de la solution <text:span text:style-name="T17">S</text:span><text:span text:style-name="T9">1</text:span><text:span text:style-name="T15"> est C</text:span><text:span text:style-name="T9">1</text:span><text:span text:style-name="T15"> = 1,84.10</text:span><text:span text:style-name="T5">-1</text:span><text:span text:style-name="T15"> </text:span><text:span text:style-name="T16">mol.L</text:span><text:span text:style-name="T6">-1</text:span></text:p>
      <text:p text:style-name="Standard">2.1.3 Déterminer le volume V<text:span text:style-name="T7">1</text:span> prélevé de la solution S<text:span text:style-name="T7">1</text:span> pour préparer la solution S<text:span text:style-name="T7">a</text:span> . </text:p>
      <text:p text:style-name="Standard">2.2 Analyse du comprimé :</text:p>
      <text:p text:style-name="Standard">Un élève stagiaire dissout un comprimé antiacide de masse m = 125 g contenant de l’hydroxyde de</text:p>
      <text:p text:style-name="Standard">magnésium (Mg<text:span text:style-name="T2">2+ </text:span>, 2OH<text:span text:style-name="T2">-</text:span> ) dans un bécher contenant 50c<text:span text:style-name="T18">m</text:span><text:span text:style-name="T6">3 </text:span>d’eau distillée puis il ajoute un volume</text:p>
      <text:p text:style-name="P1">V = 50 cm³<text:span text:style-name="T6"> </text:span>de la solution d’acide sulfurique <text:span text:style-name="T18">S</text:span><text:span text:style-name="T10">a </text:span>de concentration <text:span text:style-name="T18">C</text:span><text:span text:style-name="T10">a</text:span><text:span text:style-name="T16"> = 5,0.</text:span><text:span text:style-name="T14">10</text:span><text:span text:style-name="T3">-2</text:span><text:span text:style-name="T14"> mol.L</text:span><text:span text:style-name="T3">-1 </text:span><text:span text:style-name="T14">.</text:span></text:p>
      <text:p text:style-name="Standard">L’hydroxyde de magnésium est une dibase forte.</text:p>
      <text:p text:style-name="Standard">2.2.1 Donner la définition d’une base forte.</text:p>
      <text:p text:style-name="Standard">2.2.2 Calculer la quantité de matière d’acide sulfurique <text:span text:style-name="T16">H</text:span><text:span text:style-name="T10">2</text:span><text:span text:style-name="T16">SO</text:span><text:span text:style-name="T10">4</text:span><text:span text:style-name="T16"> </text:span><text:span text:style-name="T13">ajoutée</text:span> dans le bécher. </text:p>
      <text:p text:style-name="Standard">2.2.3 Ecrire l’équation bilan de la réaction entre l’acide sulfurique et l’hydroxyde de magnésium</text:p>
      <text:p text:style-name="Standard">2.2.4 L’excès d’acide sulfurique dans le bécher est neutralisé par un volume <text:span text:style-name="T18">V</text:span><text:span text:style-name="T10">3</text:span><text:span text:style-name="T18"> </text:span>= 20, 0 c<text:span text:style-name="T18">m</text:span><text:span text:style-name="T6">3</text:span> d’une</text:p>
      <text:p text:style-name="P1">solution d’hydroxyde de sodium (Na<text:span text:style-name="T2">+</text:span> , OH<text:span text:style-name="T2">- </text:span>) de concentration <text:span text:style-name="T18">C</text:span><text:span text:style-name="T10">b</text:span><text:span text:style-name="T16"> = 5,0.</text:span><text:span text:style-name="T14">10</text:span><text:span text:style-name="T3">-2</text:span><text:span text:style-name="T14"> mol.L</text:span><text:span text:style-name="T3">-1 </text:span></text:p>
      <text:p text:style-name="Standard">2.2.4.1 Ecrire l’équation bilan de la réaction de neutralisation de l’excès d’acide sulfurique par la</text:p>
      <text:p text:style-name="Standard">solution d’hydroxyde de sodium, puis en déduire la quantité de matière d’acide sulfurique</text:p>
      <text:p text:style-name="Standard">en excès.</text:p>
      <text:p text:style-name="Standard">2.2.4.2 Déterminer la masse d’hydroxyde de magnésium en mg dans le comprimé antiacide.</text:p>
      <text:p text:style-name="Standard">2.2.4.3 Calculer le pourcentage en masse d'hydroxyde de magnésium dans le comprimé antiaci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9:23:34.102895648</meta:creation-date>
    <dc:date>2023-11-10T23:54:34.745347122</dc:date>
    <meta:editing-duration>PT4H53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447" meta:character-count="2589" meta:non-whitespace-character-count="2167"/>
  </office:meta>
</office:document-meta>
</file>