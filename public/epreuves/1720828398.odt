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A0000000741526C1F37FD474A1.png" manifest:media-type="image/png"/>
  <manifest:file-entry manifest:full-path="Pictures/10000201000001060000011C57AB702EB0F257B2.png" manifest:media-type="image/png"/>
  <manifest:file-entry manifest:full-path="Pictures/10000000000001BA0000023152F9B31759BEB58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c001d"/>
    </style:style>
    <style:style style:name="P2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823b0b"/>
      <style:text-properties officeooo:paragraph-rsid="00080a83"/>
    </style:style>
    <style:style style:name="P3" style:family="paragraph" style:parent-style-name="Standard">
      <style:paragraph-properties fo:text-align="center" style:justify-single-word="false"/>
      <style:text-properties officeooo:paragraph-rsid="000594c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594c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594cd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0594c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080a83" style:font-size-asian="14pt" style:language-asian="fr" style:country-asian="FR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officeooo:paragraph-rsid="000594cd" style:font-size-asian="14pt" style:language-asian="fr" style:country-asian="FR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594cd" style:font-size-asian="14pt" style:language-asian="fr" style:country-asian="FR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/>
      <style:text-properties style:font-name="Times New Roman" fo:font-size="14pt" style:text-underline-style="solid" style:text-underline-width="auto" style:text-underline-color="font-color" fo:font-weight="bold" officeooo:paragraph-rsid="000594cd" style:font-size-asian="14pt" style:language-asian="fr" style:country-asian="FR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.635cm" style:auto-text-indent="false"/>
      <style:text-properties officeooo:paragraph-rsid="000594c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officeooo:paragraph-rsid="000594cd"/>
    </style:style>
    <style:style style:name="P14" style:family="paragraph" style:parent-style-name="List_20_Paragraph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594cd"/>
    </style:style>
    <style:style style:name="P17" style:family="paragraph" style:parent-style-name="Header" style:master-page-name="Standard">
      <style:paragraph-properties style:page-number="auto" style:border-line-width-bottom="0.106cm 0.026cm 0.026cm" fo:padding-left="0cm" fo:padding-right="0cm" fo:padding-top="0cm" fo:padding-bottom="0.035cm" fo:border-left="none" fo:border-right="none" fo:border-top="none" fo:border-bottom="4.51pt double #823b0b"/>
      <style:text-properties officeooo:paragraph-rsid="00080a83"/>
    </style:style>
    <style:style style:name="P18" style:family="paragraph" style:parent-style-name="List_20_Paragraph" style:list-style-name="WWNum6">
      <style:paragraph-properties fo:margin-top="0cm" fo:margin-bottom="0cm" loext:contextual-spacing="true"/>
      <style:text-properties officeooo:paragraph-rsid="000594cd"/>
    </style:style>
    <style:style style:name="P19" style:family="paragraph" style:parent-style-name="List_20_Paragraph" style:list-style-name="WWNum6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20" style:family="paragraph" style:parent-style-name="List_20_Paragraph" style:list-style-name="WWNum7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21" style:family="paragraph" style:parent-style-name="List_20_Paragraph" style:list-style-name="WWNum8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22" style:family="paragraph" style:parent-style-name="List_20_Paragraph" style:list-style-name="WWNum9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23" style:family="paragraph" style:parent-style-name="List_20_Paragraph" style:list-style-name="WWNum10">
      <style:paragraph-properties fo:margin-top="0cm" fo:margin-bottom="0cm" loext:contextual-spacing="true"/>
      <style:text-properties style:font-name="Times New Roman" fo:font-size="14pt" officeooo:rsid="000b3a9b" officeooo:paragraph-rsid="000b3a9b" style:font-size-asian="14pt" style:language-asian="fr" style:country-asian="FR" style:font-name-complex="Times New Roman1" style:font-size-complex="14pt"/>
    </style:style>
    <style:style style:name="P24" style:family="paragraph" style:parent-style-name="List_20_Paragraph" style:list-style-name="WWNum11">
      <style:paragraph-properties fo:margin-top="0cm" fo:margin-bottom="0cm" loext:contextual-spacing="true"/>
      <style:text-properties style:font-name="Times New Roman" fo:font-size="14pt" officeooo:paragraph-rsid="000594cd" style:font-size-asian="14pt" style:language-asian="fr" style:country-asian="FR" style:font-name-complex="Times New Roman1" style:font-size-complex="14pt"/>
    </style:style>
    <style:style style:name="P25" style:family="paragraph" style:parent-style-name="List_20_Paragraph" style:list-style-name="WWNum8">
      <style:paragraph-properties fo:margin-top="0cm" fo:margin-bottom="0cm" loext:contextual-spacing="true"/>
      <style:text-properties officeooo:paragraph-rsid="000594cd"/>
    </style:style>
    <style:style style:name="P26" style:family="paragraph" style:parent-style-name="List_20_Paragraph" style:list-style-name="WWNum9">
      <style:paragraph-properties fo:margin-top="0cm" fo:margin-bottom="0cm" loext:contextual-spacing="true"/>
      <style:text-properties officeooo:paragraph-rsid="000594cd"/>
    </style:style>
    <style:style style:name="P27" style:family="paragraph" style:parent-style-name="List_20_Paragraph" style:list-style-name="WWNum10">
      <style:paragraph-properties fo:margin-top="0cm" fo:margin-bottom="0cm" loext:contextual-spacing="true"/>
      <style:text-properties officeooo:paragraph-rsid="000594cd"/>
    </style:style>
    <style:style style:name="P28" style:family="paragraph" style:parent-style-name="List_20_Paragraph" style:list-style-name="WWNum11">
      <style:paragraph-properties fo:margin-top="0cm" fo:margin-bottom="0cm" loext:contextual-spacing="true"/>
      <style:text-properties officeooo:paragraph-rsid="000594c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4pt" fo:font-weight="bold" style:font-size-asian="14pt" style:language-asian="fr" style:country-asian="FR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080a83" style:font-size-asian="14pt" style:language-asian="fr" style:country-asian="FR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fr" style:country-asian="FR" style:font-name-complex="Times New Roman1" style:font-size-complex="14pt"/>
    </style:style>
    <style:style style:name="T5" style:family="text">
      <style:text-properties style:font-name="Times New Roman" fo:font-size="14pt" officeooo:rsid="00080a83" style:font-size-asian="14pt" style:language-asian="fr" style:country-asian="FR" style:font-name-complex="Times New Roman1" style:font-size-complex="14pt"/>
    </style:style>
    <style:style style:name="T6" style:family="text">
      <style:text-properties style:font-name="Times New Roman" fo:font-size="14pt" officeooo:rsid="00094e75" style:font-size-asian="14pt" style:language-asian="fr" style:country-asian="FR" style:font-name-complex="Times New Roman1" style:font-size-complex="14pt"/>
    </style:style>
    <style:style style:name="T7" style:family="text">
      <style:text-properties style:font-name="Times New Roman" fo:font-size="14pt" officeooo:rsid="000b3a9b" style:font-size-asian="14pt" style:language-asian="fr" style:country-asian="FR" style:font-name-complex="Times New Roman1" style:font-size-complex="14pt"/>
    </style:style>
    <style:style style:name="T8" style:family="text">
      <style:text-properties style:font-name="Times New Roman" fo:font-size="14pt" officeooo:rsid="000d8eb0" style:font-size-asian="14pt" style:language-asian="fr" style:country-asian="FR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80a83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style:font-size-asian="14pt" style:language-asian="fr" style:country-asian="FR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106462" style:font-size-asian="14pt" style:language-asian="fr" style:country-asian="FR" style:font-weight-asian="bold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language-asian="fr" style:country-asian="FR" style:font-style-asian="italic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bold" style:text-underline-color="font-color" style:font-size-asian="14pt" style:font-name-complex="Times New Roman1" style:font-size-complex="14pt"/>
    </style:style>
    <style:style style:name="T15" style:family="text">
      <style:text-properties style:text-position="super 58%" style:font-name="Times New Roman" fo:font-size="14pt" style:font-size-asian="14pt" style:language-asian="fr" style:country-asian="FR" style:font-name-complex="Times New Roman1" style:font-size-complex="14pt"/>
    </style:style>
    <style:style style:name="T16" style:family="text">
      <style:text-properties style:text-position="super 58%" style:font-name="Times New Roman" fo:font-size="14pt" officeooo:rsid="00080a83" style:font-size-asian="14pt" style:font-name-complex="Times New Roman1" style:font-size-complex="14pt"/>
    </style:style>
    <style:style style:name="T17" style:family="text">
      <style:text-properties style:text-position="sub 58%" style:font-name="Times New Roman" fo:font-size="14pt" fo:font-weight="bold" style:font-size-asian="14pt" style:language-asian="fr" style:country-asian="FR" style:font-weight-asian="bold" style:font-name-complex="Times New Roman1" style:font-size-complex="14pt"/>
    </style:style>
    <style:style style:name="T18" style:family="text">
      <style:text-properties style:text-position="sub 58%" style:font-name="Times New Roman" fo:font-size="14pt" style:font-size-asian="14pt" style:language-asian="fr" style:country-asian="FR" style:font-name-complex="Times New Roman1" style:font-size-complex="14pt"/>
    </style:style>
    <style:style style:name="T19" style:family="text">
      <style:text-properties style:text-position="sub 58%" style:font-name="Times New Roman" fo:font-size="14pt" officeooo:rsid="00094e75" style:font-size-asian="14pt" style:language-asian="fr" style:country-asian="FR" style:font-name-complex="Times New Roman1" style:font-size-complex="14pt"/>
    </style:style>
    <style:style style:name="T20" style:family="text">
      <style:text-properties style:font-name="Cambria" fo:font-size="14pt" style:font-size-asian="14pt" style:font-size-complex="14pt"/>
    </style:style>
    <style:style style:name="T21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2" style:family="text">
      <style:text-properties style:font-name="Calibri Light" fo:font-size="14pt" style:text-underline-style="solid" style:text-underline-width="bold" style:text-underline-color="font-color" style:font-size-asian="14pt" style:font-size-complex="14pt"/>
    </style:style>
    <style:style style:name="T23" style:family="text">
      <style:text-properties style:font-name="Calibri Light" fo:font-size="14pt" style:font-size-asian="14pt" style:font-size-complex="14pt"/>
    </style:style>
    <style:style style:name="T24" style:family="text">
      <style:text-properties style:text-position="0% 100%" style:font-name="Times New Roman" fo:font-size="14pt" style:font-size-asian="14pt" style:language-asian="fr" style:country-asian="FR" style:font-name-complex="Times New Roman1" style:font-size-complex="14pt"/>
    </style:style>
    <style:style style:name="T25" style:family="text">
      <style:text-properties style:font-name="Liberation Serif1" fo:font-size="14pt" officeooo:rsid="000b3a9b" style:font-size-asian="14pt" style:language-asian="fr" style:country-asian="FR" style:font-name-complex="Times New Roman1" style:font-size-complex="14pt"/>
    </style:style>
    <style:style style:name="T26" style:family="text">
      <style:text-properties officeooo:rsid="000d8eb0"/>
    </style:style>
    <style:style style:name="T27" style:family="text">
      <style:text-properties officeooo:rsid="00106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318cm, 2.656cm, 4.24cm, 0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 20" text:anchor-type="char" svg:x="5.509cm" svg:y="-0.22cm" svg:width="2.122cm" svg:height="1.921cm" draw:z-index="1"><draw:image xlink:href="Pictures/10000000000001BA0000023152F9B31759BEB589.jpg" xlink:type="simple" xlink:show="embed" xlink:actuate="onLoad" loext:mime-type="image/jpeg"/><svg:desc>Description : Description : Albatrose</svg:desc></draw:frame><text:span text:style-name="T20">CEG OKOUN SEME <text:s text:c="54"/></text:span><text:span text:style-name="T21">Année Scolaire :</text:span><text:span text:style-name="T20"> 2021-2022</text:span></text:p>
      <text:p text:style-name="P2"><text:span text:style-name="T22">Tél</text:span><text:span text:style-name="T23"> :</text:span><text:span text:style-name="T9"> 97 12 17 01</text:span><text:span text:style-name="T23"> <text:s text:c="58"/></text:span><text:span text:style-name="T14">Classe</text:span><text:span text:style-name="T9"> : <text:s/></text:span><text:span text:style-name="T10">3</text:span><text:span text:style-name="T16">ème</text:span></text:p>
      <text:p text:style-name="P2"><text:span text:style-name="T9">BP 17 Sèmè-Podji</text:span><text:span text:style-name="T23"> <text:s text:c="55"/></text:span><text:span text:style-name="T14">Durée</text:span><text:span text:style-name="T9"> : </text:span><text:span text:style-name="T10">2</text:span><text:span text:style-name="T9">h</text:span><text:span text:style-name="T10">eures</text:span></text:p>
      <text:p text:style-name="P7"/>
      <text:p text:style-name="P5"><text:span text:style-name="T12">COMPOSITION DU PREMIER TRIMESTRE</text:span><text:span text:style-name="T11"> </text:span></text:p>
      <text:p text:style-name="P5"><text:span text:style-name="T11">Epreuve </text:span><text:span text:style-name="T4">: PCT</text:span></text:p>
      <text:p text:style-name="P9">Conpetences Disciplinares Evaluées</text:p>
      <text:p text:style-name="P4"><text:span text:style-name="T2">CD</text:span><text:span text:style-name="T17">1</text:span><text:span text:style-name="T18">  </text:span><text:span text:style-name="T4">: <text:s/>Élaborer une explication d’un fait ou d’un phénomène de son environnement naturel ou construit en mettant en œuvre les modes de environnement propr</text:span><text:span text:style-name="T5">e</text:span><text:span text:style-name="T4">s à la physique, à la chimie et à la technologie.</text:span></text:p>
      <text:p text:style-name="P5"><text:span text:style-name="T2">A – </text:span><text:span text:style-name="T11">CHIMIE ET TECHNOLOGIE</text:span></text:p>
      <text:p text:style-name="P10">Contexte </text:p>
      <text:p text:style-name="P12"><text:span text:style-name="T4">Dans le but de joindre la pratique à la théorie, deux groupes d’élèves à la cl</text:span><text:span text:style-name="T5">a</text:span><text:span text:style-name="T4">sse de 3</text:span><text:span text:style-name="T15">ème</text:span><text:span text:style-name="T4"> réalisent des expériences au laboratoires du CEG OKOUN-SEME.</text:span></text:p>
      <text:list xml:id="list3990540057" text:style-name="WWNum6">
        <text:list-item>
          <text:p text:style-name="P18"><text:span text:style-name="T4">Le premier groupe est appelé à étudier l’action de l’acide chlor</text:span><text:span text:style-name="T5">hy</text:span><text:span text:style-name="T4">drique sur l’aluminium après avoir introduit une masse m d’aluminium dans un bécher contenant un volume V d’acide chlorhydrique.</text:span></text:p>
        </text:list-item>
        <text:list-item>
          <text:p text:style-name="P19">Le deuxième groupe réalise différents test<text:span text:style-name="T26">s </text:span>pour identifier les ions présents dans le mélange du bécher après l’action de l’acide chlorhydrique sur l’aluminium.</text:p>
        </text:list-item>
      </text:list>
      <text:p text:style-name="P6"><text:span text:style-name="T2">Suppor</text:span><text:span text:style-name="T4">t</text:span></text:p>
      <text:list xml:id="list1499956649" text:style-name="WWNum7">
        <text:list-item>
          <text:p text:style-name="P20">Informations sur l’expérience réalisée par les apprenants des groupes n°1 et n°2.</text:p>
        </text:list-item>
      </text:list>
      <text:list xml:id="list3054540202" text:style-name="WWNum8">
        <text:list-item>
          <text:p text:style-name="P21">Volume de solution d’acide chlorhydrique dans le bécher : V = 500 ml.</text:p>
        </text:list-item>
        <text:list-item>
          <text:p text:style-name="P21">Masse du métal aluminium introduit dans la solution d’acide chlorhydrique : m = 2g.</text:p>
        </text:list-item>
        <text:list-item>
          <text:p text:style-name="P25"><text:span text:style-name="T4">Masse molaire atomique en g.mol</text:span><text:span text:style-name="T15">-1 </text:span><text:span text:style-name="T4">; M(Al) = 27</text:span></text:p>
        </text:list-item>
      </text:list>
      <text:p text:style-name="P6"><text:span text:style-name="T11">Tache</text:span><text:span text:style-name="T4"> : Expliquer des faits</text:span></text:p>
      <text:p text:style-name="P11">1</text:p>
      <text:list xml:id="list4138474304" text:style-name="WWNum9">
        <text:list-item>
          <text:list>
            <text:list-item>
              <text:p text:style-name="P22">Dis comment on peut identifier l<text:span text:style-name="T26">e</text:span> gaz dégagé lors de la réaction de l’acide chlorhydrique sur l’aluminium puis écris l’équation globale de la réaction.</text:p>
            </text:list-item>
            <text:list-item>
              <text:p text:style-name="P26"><text:span text:style-name="T4">Détermine la concentration Ca de l’acide puis le volume</text:span><text:span text:style-name="T15"> </text:span>V<text:span text:style-name="T19">g</text:span><text:span text:style-name="T24"> </text:span><text:span text:style-name="T4">du gaz dégagé.</text:span></text:p>
            </text:list-item>
            <text:list-item>
              <text:p text:style-name="P22">Propose des tests pour identifier chacun des ions présents dans le mélange contenu dans le bécher après l’action de l’acide chlorhydrique sur l’aluminium.</text:p>
            </text:list-item>
          </text:list>
        </text:list-item>
      </text:list>
      <text:p text:style-name="P5"><text:span text:style-name="T2">B –</text:span><text:span text:style-name="T11"> PHYSIQUE ET TECHNOLOGIE</text:span></text:p>
      <text:p text:style-name="P10">Contexte </text:p>
      <text:p text:style-name="P13"><text:span text:style-name="T4">Les deux groupes d’élèves décident de faire le point des savoir construire sur le fonctionnement du treuil qui est un dispositif utilisé pour pu</text:span><text:span text:style-name="T8">i</text:span><text:span text:style-name="T4">ser facilement l’eau du puits et sur le travail et puissance d’une force. A cet effet, ils considèrent une camionnette chargée de sable et se dépl</text:span><text:span text:style-name="T5">ace</text:span><text:span text:style-name="T4"> sur une piste CD. (Voir Figure)</text:span></text:p>
      <text:p text:style-name="P6"><text:span text:style-name="T2">Suppo</text:span><text:span text:style-name="T3">r</text:span><text:span text:style-name="T2">t </text:span></text:p>
      <text:list xml:id="list4524958978868" text:continue-list="list1499956649" text:style-name="WWNum7">
        <text:list-item>
          <text:p text:style-name="P20">Informations et donnée relatives au treuil </text:p>
        </text:list-item>
      </text:list>
      <text:list xml:id="list3098696908" text:style-name="WWNum10">
        <text:list-item>
          <text:p text:style-name="P27"><text:soft-page-break/><text:span text:style-name="T4">La long</text:span><text:span text:style-name="T5">u</text:span><text:span text:style-name="T4">eur de la manivelle est <text:s/>L = </text:span><text:span text:style-name="T8">0,3</text:span><text:span text:style-name="T4">m <text:s text:c="23"/></text:span></text:p>
        </text:list-item>
        <text:list-item>
          <text:p text:style-name="P27"><text:span text:style-name="T4">Le rayon du t</text:span><text:span text:style-name="T5">a</text:span><text:span text:style-name="T4">mbou</text:span><text:span text:style-name="T5">r</text:span><text:span text:style-name="T4"> est r = 0,</text:span><text:span text:style-name="T8">1</text:span><text:span text:style-name="T4">m</text:span></text:p>
        </text:list-item>
        <text:list-item>
          <text:p text:style-name="P27"><text:span text:style-name="T4">La profondeur du puits est H = 22m. Prend <text:s/></text:span><text:span text:style-name="T25">π</text:span><text:span text:style-name="T4">= 3,14 </text:span><draw:frame draw:style-name="fr1" draw:name="Image1" text:anchor-type="char" svg:x="12.109cm" svg:y="-0.923cm" svg:width="5.546cm" svg:height="6.011cm" draw:z-index="2"><draw:image xlink:href="Pictures/10000201000001060000011C57AB702EB0F257B2.png" xlink:type="simple" xlink:show="embed" xlink:actuate="onLoad" loext:mime-type="image/png"/></draw:frame></text:p>
        </text:list-item>
        <text:list-item>
          <text:p text:style-name="P27"><text:span text:style-name="T4">La masse du sea</text:span><text:span text:style-name="T6">u</text:span><text:span text:style-name="T4"> rempli d’un m=9kg, g=10N/Kg</text:span></text:p>
        </text:list-item>
        <text:list-item>
          <text:p text:style-name="P23">Nombre de tours n= 5 tours</text:p>
        </text:list-item>
      </text:list>
      <text:p text:style-name="P15"/>
      <text:p text:style-name="P14"/>
      <text:p text:style-name="P14"/>
      <text:p text:style-name="P14"/>
      <text:p text:style-name="P14"/>
      <text:p text:style-name="P14"/>
      <text:list xml:id="list4524317055106" text:continue-list="list4524958978868" text:style-name="WWNum7">
        <text:list-item>
          <text:p text:style-name="P20">Information et donnée relative à la camionnette<draw:frame draw:style-name="fr1" draw:name="Image2" text:anchor-type="char" svg:x="13.538cm" svg:y="0.189cm" svg:width="3.387cm" svg:height="2.455cm" draw:z-index="3"><draw:image xlink:href="Pictures/10000201000000A0000000741526C1F37FD474A1.png" xlink:type="simple" xlink:show="embed" xlink:actuate="onLoad" loext:mime-type="image/png"/></draw:frame></text:p>
        </text:list-item>
      </text:list>
      <text:list xml:id="list628943853" text:style-name="WWNum11">
        <text:list-item>
          <text:p text:style-name="P24">Masse de la camionnette chargé du sable m=200kg </text:p>
        </text:list-item>
        <text:list-item>
          <text:p text:style-name="P28"><text:span text:style-name="T4">Intensité de la charge </text:span><text:span text:style-name="T7">force </text:span><text:span text:style-name="T4">motrice : F</text:span><text:span text:style-name="T19">m</text:span><text:span text:style-name="T18"> </text:span><text:span text:style-name="T4">= 50N <text:s text:c="18"/></text:span></text:p>
        </text:list-item>
        <text:list-item>
          <text:p text:style-name="P24">La vitesse de la camionnette V=72km/h</text:p>
          <text:p text:style-name="P24"/>
        </text:list-item>
      </text:list>
      <text:p text:style-name="P6"><text:span text:style-name="T11">Tache</text:span><text:span text:style-name="T4"> : Élaborer une explication des faits</text:span></text:p>
      <text:p text:style-name="P8">2</text:p>
      <text:p text:style-name="P6"><text:span text:style-name="T4">2-1- Fais un schéma </text:span><text:span text:style-name="T7">normalisé </text:span><text:span text:style-name="T4">du dispositif utilisé pour puiser facilement l’eau du puits.</text:span></text:p>
      <text:p text:style-name="P11">2-2- Explique la condition d’équilibre du dispositif puis calcule l’intensité de la force exercée sur la manivelle.</text:p>
      <text:p text:style-name="P6"><text:span text:style-name="T4">2-3- Calcule le travail effectué par la force </text:span><text:span text:style-name="T4"><draw:frame draw:style-name="fr3" draw:name="Objet3" text:anchor-type="as-char" svg:width="0.305cm" svg:height="0.517c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"><text:s/></text:span><text:span text:style-name="T7">après n</text:span><text:span text:style-name="T4"> tours de manivelle ainsi que le travail du poids du sea</text:span><text:span text:style-name="T6">u</text:span><text:span text:style-name="T4"> d’eau. </text:span></text:p>
      <text:p text:style-name="P8">3</text:p>
      <text:p text:style-name="P6"><text:span text:style-name="T2">3-1-</text:span><text:span text:style-name="T4"> Détermine le travail de la force motrice </text:span><text:span text:style-name="T4"><draw:frame draw:style-name="fr4" draw:name="Objet4" text:anchor-type="as-char" svg:y="-0.427cm" svg:width="0.699cm" svg:height="0.58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et du poids </text:span><draw:frame draw:style-name="fr3" draw:name="Objet2" text:anchor-type="as-char" svg:width="0.293cm" svg:height="0.51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4"><text:s/>de la camionnette sur le trajet.</text:span></text:p>
      <text:p text:style-name="P6"><text:span text:style-name="T2">3-2-</text:span><text:span text:style-name="T4"> Détermine le rendement d</text:span><text:span text:style-name="T7">u </text:span><text:span text:style-name="T4">moteur de la camionnette.</text:span></text:p>
      <text:p text:style-name="P6"><text:span text:style-name="T2">3-3-</text:span><text:span text:style-name="T4"> Détermine la puissance </text:span><text:span text:style-name="T13">P </text:span><text:span text:style-name="T4">du moteur de <text:s/>la camionnette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c001d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2</text:page-number></text:span><text:s/>sur 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0:30:56.307803362</meta:creation-date>
    <dc:date>2023-11-28T00:45:20.125685730</dc:date>
    <meta:editing-duration>PT7H38M49S</meta:editing-duration>
    <meta:editing-cycles>5</meta:editing-cycles>
    <meta:generator>LibreOffice/6.4.7.2$Linux_X86_64 LibreOffice_project/40$Build-2</meta:generator>
    <meta:document-statistic meta:table-count="0" meta:image-count="3" meta:object-count="3" meta:page-count="2" meta:paragraph-count="47" meta:word-count="527" meta:character-count="3230" meta:non-whitespace-character-count="2540"/>
  </office:meta>
</office:document-meta>
</file>

<file path=Object 1/content.xml><?xml version="1.0" encoding="utf-8"?>
<math xmlns="http://www.w3.org/1998/Math/MathML" display="block">
  <semantics>
    <mover accent="true">
      <mi>F</mi>
      <mo stretchy="true">⃗</mo>
    </mover>
    <annotation encoding="StarMath 5.0">widevec {F}</annotation>
  </semantics>
</math>
</file>

<file path=Object 3/content.xml><?xml version="1.0" encoding="utf-8"?>
<math xmlns="http://www.w3.org/1998/Math/MathML" display="block">
  <semantics>
    <mover accent="true">
      <mi>P</mi>
      <mo stretchy="true">⃗</mo>
    </mover>
    <annotation encoding="StarMath 5.0">widevec {P}</annotation>
  </semantics>
</math>
</file>

<file path=Object 4/content.xml><?xml version="1.0" encoding="utf-8"?>
<math xmlns="http://www.w3.org/1998/Math/MathML" display="block">
  <semantics>
    <mover accent="true">
      <msub>
        <mi>F</mi>
        <mi>m</mi>
      </msub>
      <mo stretchy="true">⃗</mo>
    </mover>
    <annotation encoding="StarMath 5.0">widevec{ F_m }</annotation>
  </semantics>
</math>
</file>